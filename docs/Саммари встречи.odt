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automatic-styles>
    <style:style style:name="Table1" style:family="table">
      <style:table-properties style:width="6.6in" fo:margin-top="0in" fo:margin-bottom="0in" table:align="center" style:writing-mode="lr-tb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1826in"/>
    </style:style>
    <style:style style:name="Table1.C" style:family="table-column">
      <style:table-column-properties style:column-width="0.751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111in" fo:padding-right="0.1111in" fo:padding-top="0.0556in" fo:padding-bottom="0.0556in" fo:border-left="0.25pt solid #000000" fo:border-right="0.1pt solid #000000" fo:border-top="0.1pt solid #000000" fo:border-bottom="0.1pt solid #000000" style:writing-mode="lr-tb"/>
    </style:style>
    <style:style style:name="Table1.B1" style:family="table-cell">
      <style:table-cell-properties fo:padding-left="0.1111in" fo:padding-right="0.1111in" fo:padding-top="0.0556in" fo:padding-bottom="0.0556in" fo:border-left="none" fo:border-right="0.1pt solid #000000" fo:border-top="0.1pt solid #000000" fo:border-bottom="0.1pt solid #000000" style:writing-mode="lr-tb"/>
    </style:style>
    <style:style style:name="Table1.C1" style:family="table-cell">
      <style:table-cell-properties fo:padding-left="0.1111in" fo:padding-right="0.1111in" fo:padding-top="0.0556in" fo:padding-bottom="0.0556in" fo:border-left="none" fo:border-right="0.25pt solid #000000" fo:border-top="0.1pt solid #000000" fo:border-bottom="0.1pt solid #000000" style:writing-mode="lr-tb"/>
    </style:style>
    <style:style style:name="Table2" style:family="table">
      <style:table-properties style:width="6.6in" fo:margin-top="0in" fo:margin-bottom="0in" table:align="center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1.791in"/>
    </style:style>
    <style:style style:name="Table2.C" style:family="table-column">
      <style:table-column-properties style:column-width="1.0715in"/>
    </style:style>
    <style:style style:name="Table2.D" style:family="table-column">
      <style:table-column-properties style:column-width="1.8521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111in" fo:padding-right="0.1111in" fo:padding-top="0.0556in" fo:padding-bottom="0.0556in" fo:border-left="0.25pt solid #000000" fo:border-right="0.1pt solid #000000" fo:border-top="0.1pt solid #000000" fo:border-bottom="0.1pt solid #000000" style:writing-mode="lr-tb"/>
    </style:style>
    <style:style style:name="Table2.B1" style:family="table-cell">
      <style:table-cell-properties fo:padding-left="0.1111in" fo:padding-right="0.1111in" fo:padding-top="0.0556in" fo:padding-bottom="0.0556in" fo:border-left="none" fo:border-right="0.1pt solid #000000" fo:border-top="0.1pt solid #000000" fo:border-bottom="0.1pt solid #000000" style:writing-mode="lr-tb"/>
    </style:style>
    <style:style style:name="Table2.D1" style:family="table-cell">
      <style:table-cell-properties fo:padding-left="0.1111in" fo:padding-right="0.1111in" fo:padding-top="0.0556in" fo:padding-bottom="0.0556in" fo:border-left="none" fo:border-right="0.25pt solid #000000" fo:border-top="0.1pt solid #000000" fo:border-bottom="0.1pt solid #000000" style:writing-mode="lr-tb"/>
    </style:style>
    <style:style style:name="P1" style:family="paragraph" style:parent-style-name="Standard" style:list-style-name="WWNum46">
      <style:paragraph-properties fo:margin-top="0.0728in" fo:margin-bottom="0.0728in" style:contextual-spacing="false" fo:line-height="150%"/>
    </style:style>
    <style:style style:name="P2" style:family="paragraph" style:parent-style-name="Standard">
      <style:paragraph-properties fo:margin-top="0in" fo:margin-bottom="0.1457in" style:contextual-spacing="false" fo:line-height="150%"/>
    </style:style>
    <style:style style:name="P3" style:family="paragraph" style:parent-style-name="Standard">
      <style:paragraph-properties fo:margin-top="0.1457in" fo:margin-bottom="0in" style:contextual-spacing="false" fo:line-height="150%"/>
      <style:text-properties fo:font-size="15pt" style:font-size-asian="15pt" style:font-size-complex="15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 style:parent-style-name="Standard">
      <style:paragraph-properties fo:margin-left="-0.0209in" fo:margin-top="0.2189in" fo:margin-bottom="0.0728in" style:contextual-spacing="false" fo:line-height="150%"/>
      <style:text-properties fo:font-size="15pt" style:font-size-asian="15pt" style:font-size-complex="15pt"/>
    </style:style>
    <style:style style:name="P6" style:family="paragraph" style:parent-style-name="Standard">
      <style:paragraph-properties fo:margin-top="0in" fo:margin-bottom="0.0835in" style:contextual-spacing="false" fo:line-height="150%" fo:text-align="start" style:justify-single-word="false" fo:orphans="2" fo:widows="2"/>
      <style:text-properties fo:font-size="15pt" fo:language="ru" fo:country="RU" style:font-name-asian="Aptos1" style:font-size-asian="15pt" style:language-asian="en" style:country-asian="US" style:font-name-complex="F" style:font-size-complex="15pt" style:language-complex="ar" style:country-complex="SA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Standard" style:list-style-name="WWNum47">
      <style:paragraph-properties fo:margin-top="0.0728in" fo:margin-bottom="0.0728in" style:contextual-spacing="false" fo:line-height="150%"/>
    </style:style>
    <style:style style:name="P9" style:family="paragraph" style:parent-style-name="Standard" style:list-style-name="WWNum48">
      <style:paragraph-properties fo:margin-top="0in" fo:margin-bottom="0.1457in" style:contextual-spacing="false" fo:line-height="150%"/>
      <style:text-properties fo:font-size="15pt" style:font-size-asian="15pt" style:font-size-complex="15pt"/>
    </style:style>
    <style:style style:name="P10" style:family="paragraph" style:parent-style-name="Standard" style:list-style-name="WWNum48">
      <style:paragraph-properties fo:margin-top="0.0728in" fo:margin-bottom="0.0728in" style:contextual-spacing="false" fo:line-height="150%"/>
    </style:style>
    <style:style style:name="P11" style:family="paragraph" style:parent-style-name="Standard" style:list-style-name="WWNum49">
      <style:paragraph-properties fo:margin-top="0.0728in" fo:margin-bottom="0.0728in" style:contextual-spacing="false" fo:line-height="150%"/>
    </style:style>
    <style:style style:name="P12" style:family="paragraph" style:parent-style-name="Standard" style:list-style-name="WWNum50">
      <style:paragraph-properties fo:margin-top="0.0728in" fo:margin-bottom="0.0728in" style:contextual-spacing="false" fo:line-height="150%"/>
    </style:style>
    <style:style style:name="P13" style:family="paragraph" style:parent-style-name="Standard" style:list-style-name="WWNum51">
      <style:paragraph-properties fo:margin-top="0.0728in" fo:margin-bottom="0.0728in" style:contextual-spacing="false" fo:line-height="150%"/>
    </style:style>
    <style:style style:name="P14" style:family="paragraph" style:parent-style-name="Standard" style:list-style-name="WWNum52">
      <style:paragraph-properties fo:margin-top="0.0728in" fo:margin-bottom="0.0728in" style:contextual-spacing="false" fo:line-height="150%"/>
    </style:style>
    <style:style style:name="P15" style:family="paragraph" style:parent-style-name="Standard">
      <style:paragraph-properties fo:margin-top="0in" fo:margin-bottom="0.0835in" style:contextual-spacing="false" fo:line-height="150%" fo:text-align="start" style:justify-single-word="false" fo:orphans="2" fo:widows="2"/>
      <style:text-properties fo:language="ru" fo:country="RU" style:font-name-asian="Aptos1" style:language-asian="en" style:country-asian="US" style:font-name-complex="F" style:language-complex="ar" style:country-complex="SA"/>
    </style:style>
    <style:style style:name="P16" style:family="paragraph" style:parent-style-name="Standard" style:list-style-name="WWNum53">
      <style:paragraph-properties fo:margin-top="0.0728in" fo:margin-bottom="0.0728in" style:contextual-spacing="false" fo:line-height="150%"/>
    </style:style>
    <style:style style:name="P17" style:family="paragraph" style:parent-style-name="Standard">
      <style:paragraph-properties fo:margin-top="0in" fo:margin-bottom="0.1457in" style:contextual-spacing="false" fo:line-height="150%"/>
      <style:text-properties fo:font-size="15pt" style:font-size-asian="15pt" style:font-size-complex="15pt"/>
    </style:style>
    <style:style style:name="P18" style:family="paragraph" style:parent-style-name="Standard" style:list-style-name="WWNum54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19" style:family="paragraph" style:parent-style-name="Standard" style:list-style-name="WWNum54">
      <style:paragraph-properties fo:margin-top="0.0728in" fo:margin-bottom="0.0728in" style:contextual-spacing="false" fo:line-height="150%"/>
    </style:style>
    <style:style style:name="P20" style:family="paragraph" style:parent-style-name="Standard" style:list-style-name="WWNum55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21" style:family="paragraph" style:parent-style-name="Standard" style:list-style-name="WWNum55">
      <style:paragraph-properties fo:margin-top="0.0728in" fo:margin-bottom="0.0728in" style:contextual-spacing="false" fo:line-height="150%"/>
    </style:style>
    <style:style style:name="P22" style:family="paragraph" style:parent-style-name="Standard" style:list-style-name="WWNum56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23" style:family="paragraph" style:parent-style-name="Standard" style:list-style-name="WWNum56">
      <style:paragraph-properties fo:margin-top="0.0728in" fo:margin-bottom="0.0728in" style:contextual-spacing="false" fo:line-height="150%"/>
    </style:style>
    <style:style style:name="P24" style:family="paragraph" style:parent-style-name="Standard" style:list-style-name="WWNum57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25" style:family="paragraph" style:parent-style-name="Standard" style:list-style-name="WWNum57">
      <style:paragraph-properties fo:margin-top="0.0728in" fo:margin-bottom="0.0728in" style:contextual-spacing="false" fo:line-height="150%"/>
    </style:style>
    <style:style style:name="P26" style:family="paragraph" style:parent-style-name="Standard" style:list-style-name="WWNum58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27" style:family="paragraph" style:parent-style-name="Standard" style:list-style-name="WWNum58">
      <style:paragraph-properties fo:margin-top="0.0728in" fo:margin-bottom="0.0728in" style:contextual-spacing="false" fo:line-height="150%"/>
    </style:style>
    <style:style style:name="P28" style:family="paragraph" style:parent-style-name="Standard" style:list-style-name="WWNum59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29" style:family="paragraph" style:parent-style-name="Standard" style:list-style-name="WWNum59">
      <style:paragraph-properties fo:margin-top="0.0728in" fo:margin-bottom="0.0728in" style:contextual-spacing="false" fo:line-height="150%"/>
    </style:style>
    <style:style style:name="P30" style:family="paragraph" style:parent-style-name="Standard" style:list-style-name="WWNum60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1" style:family="paragraph" style:parent-style-name="Standard" style:list-style-name="WWNum61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2" style:family="paragraph" style:parent-style-name="Standard" style:list-style-name="WWNum62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3" style:family="paragraph" style:parent-style-name="Standard" style:list-style-name="WWNum63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4" style:family="paragraph" style:parent-style-name="Standard" style:list-style-name="WWNum64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5" style:family="paragraph" style:parent-style-name="Standard" style:list-style-name="WWNum65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6" style:family="paragraph" style:parent-style-name="Standard" style:list-style-name="WWNum66">
      <style:paragraph-properties fo:margin-top="0.0728in" fo:margin-bottom="0.0728in" style:contextual-spacing="false" fo:line-height="150%"/>
      <style:text-properties fo:font-size="15pt" style:font-size-asian="15pt" style:font-size-complex="15pt"/>
    </style:style>
    <style:style style:name="P37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T1" style:family="text">
      <style:text-properties fo:color="#000000" loext:opacity="100%" style:font-name="inter" fo:font-size="15pt" style:font-name-asian="inter1" style:font-size-asian="15pt" style:font-name-complex="inter1" style:font-size-complex="15pt"/>
    </style:style>
    <style:style style:name="T2" style:family="text">
      <style:text-properties style:text-position="super 58%" style:font-name="inter" fo:font-size="15pt" style:text-underline-style="solid" style:text-underline-width="auto" style:text-underline-color="font-color" style:font-name-asian="inter1" style:font-size-asian="15pt" style:font-name-complex="inter1" style:font-size-complex="15pt"/>
    </style:style>
    <style:style style:name="T3" style:family="text">
      <style:text-properties fo:color="#000000" loext:opacity="100%" style:font-name="inter" fo:font-weight="bold" style:font-name-asian="inter1" style:font-weight-asian="bold" style:font-name-complex="inter1"/>
    </style:style>
    <style:style style:name="T4" style:family="text">
      <style:text-properties fo:color="#000000" loext:opacity="100%" style:font-name="inter" style:font-name-asian="inter1" style:font-name-complex="inter1"/>
    </style:style>
    <style:style style:name="T5" style:family="text">
      <style:text-properties style:text-position="super 58%" style:font-name="inter" fo:font-size="8.5pt" style:text-underline-style="solid" style:text-underline-width="auto" style:text-underline-color="font-color" style:font-name-asian="inter1" style:font-size-asian="8.5pt" style:font-name-complex="inter1" style:font-size-complex="15pt"/>
    </style:style>
    <style:style style:name="gr1" style:family="graphic">
      <style:graphic-properties draw:stroke="solid" svg:stroke-width="0.0138in" svg:stroke-color="#000000" svg:stroke-opacity="0%" draw:stroke-linejoin="miter" draw:fill="solid" draw:fill-color="#ffffff" draw:textarea-vertical-align="top" draw:auto-grow-height="false" fo:min-height="0in" fo:min-width="6.4075in" fo:padding-top="0.0492in" fo:padding-bottom="0.0492in" fo:padding-left="0.0984in" fo:padding-right="0.0984in" fo:wrap-option="wrap" loext:decorative="false" fo:margin-left="0.0102in" fo:margin-right="0.0102in" fo:margin-top="0.011in" fo:margin-bottom="0.009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0%" draw:stroke-linejoin="miter" draw:fill="solid" draw:fill-color="#ffffff" draw:textarea-vertical-align="top" draw:auto-grow-height="false" fo:min-height="0in" fo:min-width="6.4075in" fo:padding-top="0.0492in" fo:padding-bottom="0.0492in" fo:padding-left="0.0984in" fo:padding-right="0.0984in" fo:wrap-option="wrap" loext:decorative="false" fo:margin-left="0.0102in" fo:margin-right="0.0102in" fo:margin-top="0.0083in" fo:margin-bottom="0.0118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000000" svg:stroke-opacity="0%" draw:stroke-linejoin="miter" draw:fill="solid" draw:fill-color="#ffffff" draw:textarea-vertical-align="top" draw:auto-grow-height="false" fo:min-height="0in" fo:min-width="6.4075in" fo:padding-top="0.0492in" fo:padding-bottom="0.0492in" fo:padding-left="0.0984in" fo:padding-right="0.0984in" fo:wrap-option="wrap" loext:decorative="false" fo:margin-left="0.0102in" fo:margin-right="0.0102in" fo:margin-top="0.0154in" fo:margin-bottom="0.0154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000000" svg:stroke-opacity="0%" draw:stroke-linejoin="miter" draw:fill="solid" draw:fill-color="#ffffff" draw:textarea-vertical-align="top" draw:auto-grow-height="false" fo:min-height="0in" fo:min-width="6.4075in" fo:padding-top="0.0492in" fo:padding-bottom="0.0492in" fo:padding-left="0.0984in" fo:padding-right="0.0984in" fo:wrap-option="wrap" loext:decorative="false" fo:margin-left="0.0102in" fo:margin-right="0.0102in" fo:margin-top="0.0138in" fo:margin-bottom="0.016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38in" svg:stroke-color="#000000" svg:stroke-opacity="0%" draw:stroke-linejoin="miter" draw:fill="solid" draw:fill-color="#ffffff" draw:textarea-vertical-align="top" draw:auto-grow-height="false" fo:min-height="0in" fo:min-width="6.4075in" fo:padding-top="0.0492in" fo:padding-bottom="0.0492in" fo:padding-left="0.0984in" fo:padding-right="0.0984in" fo:wrap-option="wrap" loext:decorative="false" fo:margin-left="0.0102in" fo:margin-right="0.0102in" fo:margin-top="0.0126in" fo:margin-bottom="0.007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6">
        <text:list-item>
          <text:p text:style-name="P1"><text:span text:style-name="T1">Общая тема проекта</text:span><text:bookmark text:name="fnref40"/><text:a xlink:type="simple" xlink:href="#fn40" text:style-name="ListLabel_20_613" text:visited-style-name="ListLabel_20_613"><text:span text:style-name="T2">[40]</text:span></text:a><text:bookmark text:name="fnref41"/><text:a xlink:type="simple" xlink:href="#fn41" text:style-name="ListLabel_20_613" text:visited-style-name="ListLabel_20_613"><text:span text:style-name="T2">[41]</text:span></text:a></text:p>
        </text:list-item>
      </text:list>
      <text:p text:style-name="P2"><text:span text:style-name="T1">Создаётся мультиагентная система из нейроаналитиков и нейропродажника для застройщика коттеджного посёлка (пилот в строительстве, Краснодарский край), работающая поверх сайта и amoCRM.</text:span><text:bookmark text:name="fnref41_1"/><text:a xlink:type="simple" xlink:href="#fn41" text:style-name="ListLabel_20_613" text:visited-style-name="ListLabel_20_613"><text:span text:style-name="T2">[41]</text:span></text:a><text:bookmark text:name="fnref40_1"/><text:a xlink:type="simple" xlink:href="#fn40" text:style-name="ListLabel_20_613" text:visited-style-name="ListLabel_20_613"><text:span text:style-name="T2">[40]</text:span></text:a><text:span text:style-name="T1"><text:line-break/>Система должна в онлайне и пост‑фактум анализировать поведение посетителей и эффективность рекламных каналов и автоматически инициировать и вести экспертную переписку с лидами до передачи их менеджерам.</text:span><text:bookmark text:name="fnref42"/><text:a xlink:type="simple" xlink:href="#fn42" text:style-name="ListLabel_20_613" text:visited-style-name="ListLabel_20_613"><text:span text:style-name="T2">[42]</text:span></text:a><text:bookmark text:name="fnref40_2"/><text:a xlink:type="simple" xlink:href="#fn40" text:style-name="ListLabel_20_613" text:visited-style-name="ListLabel_20_613"><text:span text:style-name="T2">[40]</text:span></text:a><text:bookmark text:name="fnref41_2"/><text:a xlink:type="simple" xlink:href="#fn41" text:style-name="ListLabel_20_613" text:visited-style-name="ListLabel_20_613"><text:span text:style-name="T2">[41]</text:span></text:a><text:span text:style-name="T1"><text:line-break/>Цель — уменьшить потери дорогих лидов, повысить конверсию и заложить универсальный продукт, который можно адаптировать под другие отрасли через настройку модулей и базы знаний.</text:span><text:bookmark text:name="fnref43"/><text:a xlink:type="simple" xlink:href="#fn43" text:style-name="ListLabel_20_613" text:visited-style-name="ListLabel_20_613"><text:span text:style-name="T2">[43]</text:span></text:a><text:bookmark text:name="fnref40_3"/><text:a xlink:type="simple" xlink:href="#fn40" text:style-name="ListLabel_20_613" text:visited-style-name="ListLabel_20_613"><text:span text:style-name="T2">[40]</text:span></text:a><text:bookmark text:name="fnref41_3"/><text:a xlink:type="simple" xlink:href="#fn41" text:style-name="ListLabel_20_613" text:visited-style-name="ListLabel_20_613"><text:span text:style-name="T2">[41]</text:span></text:a></text:p>
      <text:p text:style-name="P3"><draw:custom-shape text:anchor-type="as-char" draw:z-index="0" draw:name="Прямоугольник 6" draw:style-name="gr1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2_основные_обсуждаемые_темы"/><text:span text:style-name="T3">2. Основные обсуждаемые темы</text:span><text:bookmark-end text:name="bm_2_основные_обсуждаемые_темы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4">Тема</text:span></text:p>
          </table:table-cell>
          <table:table-cell table:style-name="Table1.B1" office:value-type="string">
            <text:p text:style-name="P6"><text:span text:style-name="T4">Краткое описание</text:span></text:p>
          </table:table-cell>
          <table:table-cell table:style-name="Table1.C1" office:value-type="string">
            <text:p text:style-name="P6"><text:span text:style-name="T4">Источник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Бизнес‑контекст и пилот</text:span></text:p>
          </table:table-cell>
          <table:table-cell table:style-name="Table1.B1" office:value-type="string">
            <text:p text:style-name="P6"><text:span text:style-name="T4">Пилот на коттеджном посёлке застройщика в Краснодарском крае, объект построен, идёт этап продаж, лид дорогой, потери критичны.</text:span></text:p>
          </table:table-cell>
          <table:table-cell table:style-name="Table1.C1" office:value-type="string">
            <text:p text:style-name="P6"><text:span text:style-name="T4">Часть 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Нейроаналитик: поведение на сайте</text:span></text:p>
          </table:table-cell>
          <table:table-cell table:style-name="Table1.B1" office:value-type="string">
            <text:p text:style-name="P6"><text:span text:style-name="T4">Аналитика поведения на сайте через Яндекс.Метрику/вебвизор и тепловые карты, выделение ключевых разделов и “мусорных” зон.</text:span></text:p>
          </table:table-cell>
          <table:table-cell table:style-name="Table1.C1" office:value-type="string">
            <text:p text:style-name="P6"><text:span text:style-name="T4">Части 1–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Нейроаналитик: каналы и бюджет</text:span></text:p>
          </table:table-cell>
          <table:table-cell table:style-name="Table1.B1" office:value-type="string">
            <text:p text:style-name="P6"><text:span text:style-name="T4">Анализ источников лидов (Avito, VK, Директ и др.), конверсий до договора и рекомендации по перераспределению рекламного бюджета.</text:span></text:p>
          </table:table-cell>
          <table:table-cell table:style-name="Table1.C1" office:value-type="string">
            <text:p text:style-name="P6"><text:span text:style-name="T4">Части 1–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Нейропродажник (чат‑бот)</text:span></text:p>
          </table:table-cell>
          <table:table-cell table:style-name="Table1.B1" office:value-type="string">
            <text:p text:style-name="P6"><text:span text:style-name="T4">Экспертная переписка с лидами, генерация персональных КП, коммуникативный стиль “как живой человек”, точка передачи менеджеру.</text:span></text:p>
          </table:table-cell>
          <table:table-cell table:style-name="Table1.C1" office:value-type="string">
            <text:p text:style-name="P6"><text:span text:style-name="T4">Части 1–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Интеграции: amoCRM и сервисы</text:span></text:p>
          </table:table-cell>
          <table:table-cell table:style-name="Table1.B1" office:value-type="string">
            <text:p text:style-name="P6"><text:span text:style-name="T4">Базовая CRM — amoCRM, интеграции с сайтом, Яндекс.Метрикой, IntellectDialog (телефоны), мессенджерами, IP‑телефонией, Avito.</text:span></text:p>
          </table:table-cell>
          <table:table-cell table:style-name="Table1.C1" office:value-type="string">
            <text:p text:style-name="P6"><text:span text:style-name="T4">Части 1–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Персональные данные и 152‑ФЗ</text:span></text:p>
          </table:table-cell>
          <table:table-cell table:style-name="Table1.B1" office:value-type="string">
            <text:p text:style-name="P6"><text:span text:style-name="T4">Ограничения по трансграничной передаче ПД, необходимость обезличивания и/или локальных моделей, спор о сокрытии факта бота.</text:span></text:p>
          </table:table-cell>
          <table:table-cell table:style-name="Table1.C1" office:value-type="string">
            <text:p text:style-name="P6"><text:span text:style-name="T4">Части 2–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Архитектура и мультиагентность</text:span></text:p>
          </table:table-cell>
          <table:table-cell table:style-name="Table1.B1" office:value-type="string">
            <text:p text:style-name="P6"><text:span text:style-name="T4">Отказ от монолита, дизайн набора агентов (нейроаналитики, нейропродажник, оркестратор, в перспективе нейроконтроллер/прогноз).</text:span></text:p>
          </table:table-cell>
          <table:table-cell table:style-name="Table1.C1" office:value-type="string">
            <text:p text:style-name="P6"><text:span text:style-name="T4">Часть 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Каналы и сценарии коммуникации</text:span></text:p>
          </table:table-cell>
          <table:table-cell table:style-name="Table1.B1" office:value-type="string">
            <text:p text:style-name="P6"><text:span text:style-name="T4">Выбор каналов (Telegram, Авито, SMS, звонок, виджет на сайте), логика точек касания и fallback‑сценариев.</text:span></text:p>
          </table:table-cell>
          <table:table-cell table:style-name="Table1.C1" office:value-type="string">
            <text:p text:style-name="P6"><text:span text:style-name="T4">Части 1–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База знаний и скрипты</text:span></text:p>
          </table:table-cell>
          <table:table-cell table:style-name="Table1.B1" office:value-type="string">
            <text:p text:style-name="P6"><text:span text:style-name="T4">Использование существующих скриптов, диалогов, описаний ЦА и объектов как базы знаний, но с их переработкой и “очеловечиванием”.</text:span></text:p>
          </table:table-cell>
          <table:table-cell table:style-name="Table1.C1" office:value-type="string">
            <text:p text:style-name="P6"><text:span text:style-name="T4">Части 1–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Онлайновая vs офлайновая аналитика</text:span></text:p>
          </table:table-cell>
          <table:table-cell table:style-name="Table1.B1" office:value-type="string">
            <text:p text:style-name="P6"><text:span text:style-name="T4">Разделение: онлайн‑реакция в минуты и периодические стратегические отчёты по сайту и CRM.</text:span></text:p>
          </table:table-cell>
          <table:table-cell table:style-name="Table1.C1" office:value-type="string">
            <text:p text:style-name="P6"><text:span text:style-name="T4">Части 1–3</text:span></text:p>
          </table:table-cell>
        </table:table-row>
      </table:table>
      <text:p text:style-name="P7"/>
      <text:p text:style-name="P3"><draw:custom-shape text:anchor-type="as-char" draw:z-index="1" draw:name="Прямоугольник 5" draw:style-name="gr2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3_важная_информация"/><text:span text:style-name="T3">3. Важная информация</text:span><text:bookmark-end text:name="bm_3_важная_информация"/></text:p>
      <text:p text:style-name="P5"><text:bookmark-start text:name="бизнес_контекст"/><text:span text:style-name="T3">Бизнес‑контекст</text:span><text:bookmark-end text:name="бизнес_контекст"/></text:p>
      <text:list text:style-name="WWNum47">
        <text:list-item>
          <text:p text:style-name="P8"><text:span text:style-name="T1">Застройщик продаёт коттеджный посёлок в Краснодарском крае, посёлок уже построен, идёт активный этап продаж, стоимость лида высокая, бизнес хочет “не терять никого” и понимать, какие каналы реально приводят к договорам.</text:span><text:bookmark text:name="fnref40_4"/><text:a xlink:type="simple" xlink:href="#fn40" text:style-name="ListLabel_20_613" text:visited-style-name="ListLabel_20_613"><text:span text:style-name="T2">[40]</text:span></text:a><text:bookmark text:name="fnref41_4"/><text:a xlink:type="simple" xlink:href="#fn41" text:style-name="ListLabel_20_613" text:visited-style-name="ListLabel_20_613"><text:span text:style-name="T2">[41]</text:span></text:a></text:p>
        </text:list-item>
        <text:list-item>
          <text:p text:style-name="P8"><text:span text:style-name="T1">Продукт задуман как плюс‑минус универсальный: пилот делается под недвижимость, но архитектура и модули </text:span><text:soft-page-break/><text:span text:style-name="T1">должны позволять адаптацию к другим вертикалям (медицина, e‑commerce и др.) за счёт перенастройки базы знаний и параметров.</text:span><text:bookmark text:name="fnref41_5"/><text:a xlink:type="simple" xlink:href="#fn41" text:style-name="ListLabel_20_613" text:visited-style-name="ListLabel_20_613"><text:span text:style-name="T2">[41]</text:span></text:a><text:bookmark text:name="fnref40_5"/><text:a xlink:type="simple" xlink:href="#fn40" text:style-name="ListLabel_20_613" text:visited-style-name="ListLabel_20_613"><text:span text:style-name="T2">[40]</text:span></text:a></text:p>
        </text:list-item>
      </text:list>
      <text:p text:style-name="P5"><text:bookmark-start text:name="функциональные_требования"/><text:span text:style-name="T3">Функциональные требования</text:span><text:bookmark-end text:name="функциональные_требования"/></text:p>
      <text:list text:style-name="WWNum48">
        <text:list-item>
          <text:p text:style-name="P9"><text:span text:style-name="T4">Нейроаналитик должен:</text:span></text:p>
          <text:list>
            <text:list-item>
              <text:p text:style-name="P10"><text:span text:style-name="T1">получать из Яндекс.Метрики/вебвизора данные о поведении (страницы, клики, скролл, время, цели, сегменты) и строить отчёты по интересным/игнорируемым зонам сайта;</text:span><text:bookmark text:name="fnref44"/><text:a xlink:type="simple" xlink:href="#fn44" text:style-name="ListLabel_20_613" text:visited-style-name="ListLabel_20_613"><text:span text:style-name="T2">[44]</text:span></text:a><text:bookmark text:name="fnref45"/><text:a xlink:type="simple" xlink:href="#fn45" text:style-name="ListLabel_20_613" text:visited-style-name="ListLabel_20_613"><text:span text:style-name="T2">[45]</text:span></text:a><text:bookmark text:name="fnref46"/><text:a xlink:type="simple" xlink:href="#fn46" text:style-name="ListLabel_20_613" text:visited-style-name="ListLabel_20_613"><text:span text:style-name="T2">[46]</text:span></text:a><text:bookmark text:name="fnref42_1"/><text:a xlink:type="simple" xlink:href="#fn42" text:style-name="ListLabel_20_613" text:visited-style-name="ListLabel_20_613"><text:span text:style-name="T2">[42]</text:span></text:a><text:bookmark text:name="fnref40_6"/><text:a xlink:type="simple" xlink:href="#fn40" text:style-name="ListLabel_20_613" text:visited-style-name="ListLabel_20_613"><text:span text:style-name="T2">[40]</text:span></text:a></text:p>
            </text:list-item>
            <text:list-item>
              <text:p text:style-name="P10"><text:span text:style-name="T1">анализировать источники лидов (Avito, VK, Яндекс.Директ, рекомендации и др.), считать конверсии до договора и рекомендовать усиление/отключение каналов;</text:span><text:bookmark text:name="fnref42_2"/><text:a xlink:type="simple" xlink:href="#fn42" text:style-name="ListLabel_20_613" text:visited-style-name="ListLabel_20_613"><text:span text:style-name="T2">[42]</text:span></text:a><text:bookmark text:name="fnref44_1"/><text:a xlink:type="simple" xlink:href="#fn44" text:style-name="ListLabel_20_613" text:visited-style-name="ListLabel_20_613"><text:span text:style-name="T2">[44]</text:span></text:a><text:bookmark text:name="fnref40_7"/><text:a xlink:type="simple" xlink:href="#fn40" text:style-name="ListLabel_20_613" text:visited-style-name="ListLabel_20_613"><text:span text:style-name="T2">[40]</text:span></text:a></text:p>
            </text:list-item>
            <text:list-item>
              <text:p text:style-name="P10"><text:span text:style-name="T1">поддерживать два горизонта: оперативный (почти онлайн, для быстрых действий) и периодический (неделя/месяц, для стратегии).</text:span><text:bookmark text:name="fnref44_2"/><text:a xlink:type="simple" xlink:href="#fn44" text:style-name="ListLabel_20_613" text:visited-style-name="ListLabel_20_613"><text:span text:style-name="T2">[44]</text:span></text:a><text:bookmark text:name="fnref40_8"/><text:a xlink:type="simple" xlink:href="#fn40" text:style-name="ListLabel_20_613" text:visited-style-name="ListLabel_20_613"><text:span text:style-name="T2">[40]</text:span></text:a><text:bookmark text:name="fnref41_6"/><text:a xlink:type="simple" xlink:href="#fn41" text:style-name="ListLabel_20_613" text:visited-style-name="ListLabel_20_613"><text:span text:style-name="T2">[41]</text:span></text:a></text:p>
            </text:list-item>
          </text:list>
        </text:list-item>
        <text:list-item>
          <text:p text:style-name="P9"><text:span text:style-name="T4">Нейропродажник должен:</text:span></text:p>
          <text:list>
            <text:list-item>
              <text:p text:style-name="P10"><text:span text:style-name="T1">на основе последних действий посетителя (раздел, объект, ЦА/канал) формировать персональные </text:span><text:soft-page-break/><text:span text:style-name="T1">коммерческие предложения и отправлять их по выбранному каналу;</text:span><text:bookmark text:name="fnref47"/><text:a xlink:type="simple" xlink:href="#fn47" text:style-name="ListLabel_20_613" text:visited-style-name="ListLabel_20_613"><text:span text:style-name="T2">[47]</text:span></text:a><text:bookmark text:name="fnref40_9"/><text:a xlink:type="simple" xlink:href="#fn40" text:style-name="ListLabel_20_613" text:visited-style-name="ListLabel_20_613"><text:span text:style-name="T2">[40]</text:span></text:a><text:bookmark text:name="fnref41_7"/><text:a xlink:type="simple" xlink:href="#fn41" text:style-name="ListLabel_20_613" text:visited-style-name="ListLabel_20_613"><text:span text:style-name="T2">[41]</text:span></text:a></text:p>
            </text:list-item>
            <text:list-item>
              <text:p text:style-name="P10"><text:span text:style-name="T1">вести экспертную текстовую переписку так, чтобы она была максимально похожа на диалог со специалистом, с корректным обходом “неудобных” вопросов;</text:span><text:bookmark text:name="fnref47_1"/><text:a xlink:type="simple" xlink:href="#fn47" text:style-name="ListLabel_20_613" text:visited-style-name="ListLabel_20_613"><text:span text:style-name="T2">[47]</text:span></text:a><text:bookmark text:name="fnref40_10"/><text:a xlink:type="simple" xlink:href="#fn40" text:style-name="ListLabel_20_613" text:visited-style-name="ListLabel_20_613"><text:span text:style-name="T2">[40]</text:span></text:a></text:p>
            </text:list-item>
            <text:list-item>
              <text:p text:style-name="P10"><text:span text:style-name="T1">работать до настраиваемого этапа воронки (сбор интереса/заявки/бронь, передача менеджеру), с возможностью в других проектах идти до выставления счёта.</text:span><text:bookmark text:name="fnref40_11"/><text:a xlink:type="simple" xlink:href="#fn40" text:style-name="ListLabel_20_613" text:visited-style-name="ListLabel_20_613"><text:span text:style-name="T2">[40]</text:span></text:a><text:bookmark text:name="fnref41_8"/><text:a xlink:type="simple" xlink:href="#fn41" text:style-name="ListLabel_20_613" text:visited-style-name="ListLabel_20_613"><text:span text:style-name="T2">[41]</text:span></text:a></text:p>
            </text:list-item>
          </text:list>
        </text:list-item>
        <text:list-item>
          <text:p text:style-name="P9"><text:span text:style-name="T4">Система в целом должна уметь:</text:span></text:p>
          <text:list>
            <text:list-item>
              <text:p text:style-name="P10"><text:span text:style-name="T1">определять “готовность” лида по паттернам поведения и диалога и передавать его живому менеджеру с кратким резюме и оценкой “теплоты”;</text:span><text:bookmark text:name="fnref41_9"/><text:a xlink:type="simple" xlink:href="#fn41" text:style-name="ListLabel_20_613" text:visited-style-name="ListLabel_20_613"><text:span text:style-name="T2">[41]</text:span></text:a><text:bookmark text:name="fnref40_12"/><text:a xlink:type="simple" xlink:href="#fn40" text:style-name="ListLabel_20_613" text:visited-style-name="ListLabel_20_613"><text:span text:style-name="T2">[40]</text:span></text:a></text:p>
            </text:list-item>
            <text:list-item>
              <text:p text:style-name="P10"><text:span text:style-name="T1">обрабатывать лидов из разных каналов (сайт/Метрика, Авито, рекомендации, ручной ввод) с единым ядром аналитики и продажника.</text:span><text:bookmark text:name="fnref48"/><text:a xlink:type="simple" xlink:href="#fn48" text:style-name="ListLabel_20_613" text:visited-style-name="ListLabel_20_613"><text:span text:style-name="T2">[48]</text:span></text:a><text:bookmark text:name="fnref43_1"/><text:a xlink:type="simple" xlink:href="#fn43" text:style-name="ListLabel_20_613" text:visited-style-name="ListLabel_20_613"><text:span text:style-name="T2">[43]</text:span></text:a><text:bookmark text:name="fnref40_13"/><text:a xlink:type="simple" xlink:href="#fn40" text:style-name="ListLabel_20_613" text:visited-style-name="ListLabel_20_613"><text:span text:style-name="T2">[40]</text:span></text:a></text:p>
            </text:list-item>
          </text:list>
        </text:list-item>
      </text:list>
      <text:p text:style-name="P5"><text:bookmark-start text:name="нефункциональные_требования"/><text:span text:style-name="T3">Нефункциональные требования</text:span><text:bookmark-end text:name="нефункциональные_требования"/></text:p>
      <text:list text:style-name="WWNum49">
        <text:list-item>
          <text:p text:style-name="P11"><text:soft-page-break/><text:span text:style-name="T1">Реакция системы на горячие события (посещение целевой страницы, достижение цели, явный запрос) должна происходить в масштабе минут, задержка в несколько секунд при пролёте данных через Метрику/серверы считается приемлемой.</text:span><text:bookmark text:name="fnref42_3"/><text:a xlink:type="simple" xlink:href="#fn42" text:style-name="ListLabel_20_613" text:visited-style-name="ListLabel_20_613"><text:span text:style-name="T2">[42]</text:span></text:a><text:bookmark text:name="fnref44_3"/><text:a xlink:type="simple" xlink:href="#fn44" text:style-name="ListLabel_20_613" text:visited-style-name="ListLabel_20_613"><text:span text:style-name="T2">[44]</text:span></text:a><text:bookmark text:name="fnref40_14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1"><text:span text:style-name="T1">Диалоги нейропродажника должны быть “человекоподобными”, не вызывать ощущение тупого скриптового бота и корректно обходить вопросы без ответов.</text:span><text:bookmark text:name="fnref47_2"/><text:a xlink:type="simple" xlink:href="#fn47" text:style-name="ListLabel_20_613" text:visited-style-name="ListLabel_20_613"><text:span text:style-name="T2">[47]</text:span></text:a><text:bookmark text:name="fnref40_15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1"><text:span text:style-name="T1">Архитектура должна поддерживать масштабирование и замену моделей (локальная/облачная LLM, разные провайдеры STT/TTS) без переписывания бизнес‑логики.</text:span><text:bookmark text:name="fnref49"/><text:a xlink:type="simple" xlink:href="#fn49" text:style-name="ListLabel_20_613" text:visited-style-name="ListLabel_20_613"><text:span text:style-name="T2">[49]</text:span></text:a><text:bookmark text:name="fnref50"/><text:a xlink:type="simple" xlink:href="#fn50" text:style-name="ListLabel_20_613" text:visited-style-name="ListLabel_20_613"><text:span text:style-name="T2">[50]</text:span></text:a><text:bookmark text:name="fnref40_16"/><text:a xlink:type="simple" xlink:href="#fn40" text:style-name="ListLabel_20_613" text:visited-style-name="ListLabel_20_613"><text:span text:style-name="T2">[40]</text:span></text:a></text:p>
        </text:list-item>
      </text:list>
      <text:p text:style-name="P5"><text:bookmark-start text:name="интеграции_и_внешние_системы"/><text:span text:style-name="T3">Интеграции и внешние системы</text:span><text:bookmark-end text:name="интеграции_и_внешние_системы"/></text:p>
      <text:list text:style-name="WWNum50">
        <text:list-item>
          <text:p text:style-name="P12"><text:span text:style-name="T1">amoCRM — базовая CRM; используется для хранения лидов, источников, стадий, задач и истории коммуникаций, а также для записи результатов работы нейроагентов (резюме, “теплота”, метки).</text:span><text:bookmark text:name="fnref51"/><text:a xlink:type="simple" xlink:href="#fn51" text:style-name="ListLabel_20_613" text:visited-style-name="ListLabel_20_613"><text:span text:style-name="T2">[51]</text:span></text:a><text:bookmark text:name="fnref43_2"/><text:a xlink:type="simple" xlink:href="#fn43" text:style-name="ListLabel_20_613" text:visited-style-name="ListLabel_20_613"><text:span text:style-name="T2">[43]</text:span></text:a><text:bookmark text:name="fnref48_1"/><text:a xlink:type="simple" xlink:href="#fn48" text:style-name="ListLabel_20_613" text:visited-style-name="ListLabel_20_613"><text:span text:style-name="T2">[48]</text:span></text:a><text:bookmark text:name="fnref40_17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2"><text:span text:style-name="T1">Яндекс.Метрика (включая вебвизор и тепловые карты) — основной источник данных о поведении на сайте; </text:span><text:soft-page-break/><text:span text:style-name="T1">планируется автоматическая выгрузка отчётов/событий.</text:span><text:bookmark text:name="fnref45_1"/><text:a xlink:type="simple" xlink:href="#fn45" text:style-name="ListLabel_20_613" text:visited-style-name="ListLabel_20_613"><text:span text:style-name="T2">[45]</text:span></text:a><text:bookmark text:name="fnref46_1"/><text:a xlink:type="simple" xlink:href="#fn46" text:style-name="ListLabel_20_613" text:visited-style-name="ListLabel_20_613"><text:span text:style-name="T2">[46]</text:span></text:a><text:bookmark text:name="fnref44_4"/><text:a xlink:type="simple" xlink:href="#fn44" text:style-name="ListLabel_20_613" text:visited-style-name="ListLabel_20_613"><text:span text:style-name="T2">[44]</text:span></text:a><text:bookmark text:name="fnref40_18"/><text:a xlink:type="simple" xlink:href="#fn40" text:style-name="ListLabel_20_613" text:visited-style-name="ListLabel_20_613"><text:span text:style-name="T2">[40]</text:span></text:a><text:bookmark text:name="fnref42_4"/><text:a xlink:type="simple" xlink:href="#fn42" text:style-name="ListLabel_20_613" text:visited-style-name="ListLabel_20_613"><text:span text:style-name="T2">[42]</text:span></text:a></text:p>
        </text:list-item>
        <text:list-item>
          <text:p text:style-name="P12"><text:span text:style-name="T1">IntellectDialog (или аналог) — сторонний сервис, который, по словам заказчика, определяет телефон посетителя и интегрируется с amoCRM; архитектура должнаTreat его как опциональный источник идентификаторов, а не как жёсткую зависимость.</text:span><text:bookmark text:name="fnref40_19"/><text:a xlink:type="simple" xlink:href="#fn40" text:style-name="ListLabel_20_613" text:visited-style-name="ListLabel_20_613"><text:span text:style-name="T2">[40]</text:span></text:a><text:bookmark text:name="fnref47_3"/><text:a xlink:type="simple" xlink:href="#fn47" text:style-name="ListLabel_20_613" text:visited-style-name="ListLabel_20_613"><text:span text:style-name="T2">[47]</text:span></text:a></text:p>
        </text:list-item>
        <text:list-item>
          <text:p text:style-name="P12"><text:span text:style-name="T1">Каналы коммуникации: ранее — бизнес WhatsApp, сейчас под вопросом; рассматриваются Telegram, Авито‑чат, SMS, телефон; выбор точного набора и логики fallback остаётся открытым.</text:span><text:bookmark text:name="fnref43_3"/><text:a xlink:type="simple" xlink:href="#fn43" text:style-name="ListLabel_20_613" text:visited-style-name="ListLabel_20_613"><text:span text:style-name="T2">[43]</text:span></text:a><text:bookmark text:name="fnref48_2"/><text:a xlink:type="simple" xlink:href="#fn48" text:style-name="ListLabel_20_613" text:visited-style-name="ListLabel_20_613"><text:span text:style-name="T2">[48]</text:span></text:a><text:bookmark text:name="fnref40_20"/><text:a xlink:type="simple" xlink:href="#fn40" text:style-name="ListLabel_20_613" text:visited-style-name="ListLabel_20_613"><text:span text:style-name="T2">[40]</text:span></text:a></text:p>
        </text:list-item>
      </text:list>
      <text:p text:style-name="P5"><text:bookmark-start text:name="ограничения_и_допущения"/><text:span text:style-name="T3">Ограничения и допущения</text:span><text:bookmark-end text:name="ограничения_и_допущения"/></text:p>
      <text:list text:style-name="WWNum51">
        <text:list-item>
          <text:p text:style-name="P13"><text:span text:style-name="T1">152‑ФЗ и трансграничность: персональные данные клиентов не должны без основания уходить в зарубежные облачные сервисы; передача допустима только после обезличивания или при использовании российских провайдеров/локальных моделей.</text:span><text:bookmark text:name="fnref50_1"/><text:a xlink:type="simple" xlink:href="#fn50" text:style-name="ListLabel_20_613" text:visited-style-name="ListLabel_20_613"><text:span text:style-name="T2">[50]</text:span></text:a><text:bookmark text:name="fnref52"/><text:a xlink:type="simple" xlink:href="#fn52" text:style-name="ListLabel_20_613" text:visited-style-name="ListLabel_20_613"><text:span text:style-name="T2">[52]</text:span></text:a><text:bookmark text:name="fnref53"/><text:a xlink:type="simple" xlink:href="#fn53" text:style-name="ListLabel_20_613" text:visited-style-name="ListLabel_20_613"><text:span text:style-name="T2">[53]</text:span></text:a><text:bookmark text:name="fnref54"/><text:a xlink:type="simple" xlink:href="#fn54" text:style-name="ListLabel_20_613" text:visited-style-name="ListLabel_20_613"><text:span text:style-name="T2">[54]</text:span></text:a><text:bookmark text:name="fnref49_1"/><text:a xlink:type="simple" xlink:href="#fn49" text:style-name="ListLabel_20_613" text:visited-style-name="ListLabel_20_613"><text:span text:style-name="T2">[49]</text:span></text:a><text:bookmark text:name="fnref40_21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3"><text:span text:style-name="T1">Использование облачных LLM без оптимизации контекста создаёт риск высокой стоимости эксплуатации, </text:span><text:soft-page-break/><text:span text:style-name="T1">особенно для онлайн‑аналитики с большим объёмом данных.</text:span><text:bookmark text:name="fnref49_2"/><text:a xlink:type="simple" xlink:href="#fn49" text:style-name="ListLabel_20_613" text:visited-style-name="ListLabel_20_613"><text:span text:style-name="T2">[49]</text:span></text:a><text:bookmark text:name="fnref50_2"/><text:a xlink:type="simple" xlink:href="#fn50" text:style-name="ListLabel_20_613" text:visited-style-name="ListLabel_20_613"><text:span text:style-name="T2">[50]</text:span></text:a><text:bookmark text:name="fnref40_22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3"><text:span text:style-name="T1">Наличие и полнота исторической аналитики (по Метрике/CRM) не гарантированы; заказчик готов собирать и предоставлять данные по запросам команды.</text:span><text:bookmark text:name="fnref41_10"/><text:a xlink:type="simple" xlink:href="#fn41" text:style-name="ListLabel_20_613" text:visited-style-name="ListLabel_20_613"><text:span text:style-name="T2">[41]</text:span></text:a><text:bookmark text:name="fnref40_23"/><text:a xlink:type="simple" xlink:href="#fn40" text:style-name="ListLabel_20_613" text:visited-style-name="ListLabel_20_613"><text:span text:style-name="T2">[40]</text:span></text:a></text:p>
        </text:list-item>
      </text:list>
      <text:p text:style-name="P5"><text:bookmark-start text:name="риски"/><text:span text:style-name="T3">Риски</text:span><text:bookmark-end text:name="риски"/></text:p>
      <text:list text:style-name="WWNum52">
        <text:list-item>
          <text:p text:style-name="P14"><text:span text:style-name="T1">Юридический риск, если опираться на непрозрачные схемы получения телефонов посетителей (IntellectDialog и подобные), особенно в части соответствия 152‑ФЗ и принципам обработки ПД.</text:span><text:bookmark text:name="fnref54_1"/><text:a xlink:type="simple" xlink:href="#fn54" text:style-name="ListLabel_20_613" text:visited-style-name="ListLabel_20_613"><text:span text:style-name="T2">[54]</text:span></text:a><text:bookmark text:name="fnref49_3"/><text:a xlink:type="simple" xlink:href="#fn49" text:style-name="ListLabel_20_613" text:visited-style-name="ListLabel_20_613"><text:span text:style-name="T2">[49]</text:span></text:a><text:bookmark text:name="fnref47_4"/><text:a xlink:type="simple" xlink:href="#fn47" text:style-name="ListLabel_20_613" text:visited-style-name="ListLabel_20_613"><text:span text:style-name="T2">[47]</text:span></text:a><text:bookmark text:name="fnref40_24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4"><text:span text:style-name="T1">Бизнес‑риск потери лидов из‑за ошибок в интеграциях (Метрика → сервер → LLM → CRM) и некорректной логики триггеров; с учётом высокой стоимости лида это критично.</text:span><text:bookmark text:name="fnref40_25"/><text:a xlink:type="simple" xlink:href="#fn40" text:style-name="ListLabel_20_613" text:visited-style-name="ListLabel_20_613"><text:span text:style-name="T2">[40]</text:span></text:a><text:bookmark text:name="fnref41_11"/><text:a xlink:type="simple" xlink:href="#fn41" text:style-name="ListLabel_20_613" text:visited-style-name="ListLabel_20_613"><text:span text:style-name="T2">[41]</text:span></text:a></text:p>
        </text:list-item>
        <text:list-item>
          <text:p text:style-name="P14"><text:span text:style-name="T1">Риск “роботизированных” скриптов, которые вызывают отторжение (пример с неуместным предложением акции в клинике); требуется проектировать более интеллектуальные диалоги.</text:span><text:bookmark text:name="fnref47_5"/><text:a xlink:type="simple" xlink:href="#fn47" text:style-name="ListLabel_20_613" text:visited-style-name="ListLabel_20_613"><text:span text:style-name="T2">[47]</text:span></text:a><text:bookmark text:name="fnref40_26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4"><text:soft-page-break/><text:span text:style-name="T1">Риск рассинхрона ожиданий: заказчик может переоценивать реальную долю “определяемых телефонов” и точность онлайн‑аналитики; это нужно честно зафиксировать и тестировать.</text:span><text:bookmark text:name="fnref40_27"/><text:a xlink:type="simple" xlink:href="#fn40" text:style-name="ListLabel_20_613" text:visited-style-name="ListLabel_20_613"><text:span text:style-name="T2">[40]</text:span></text:a></text:p>
        </text:list-item>
      </text:list>
      <text:p text:style-name="P3"><draw:custom-shape text:anchor-type="as-char" draw:z-index="2" draw:name="Прямоугольник 4" draw:style-name="gr3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4_принятые_решения"/><text:span text:style-name="T3">4. Принятые решения</text:span><text:bookmark-end text:name="bm_4_принятые_решения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pan text:style-name="T4">Решение</text:span></text:p>
          </table:table-cell>
          <table:table-cell table:style-name="Table2.B1" office:value-type="string">
            <text:p text:style-name="P6"><text:span text:style-name="T4">Детали</text:span></text:p>
          </table:table-cell>
          <table:table-cell table:style-name="Table2.B1" office:value-type="string">
            <text:p text:style-name="P6"><text:span text:style-name="T4">Инициатор</text:span></text:p>
          </table:table-cell>
          <table:table-cell table:style-name="Table2.D1" office:value-type="string">
            <text:p text:style-name="P6"><text:span text:style-name="T4">Комментарий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Пилот: коттеджный посёлок в Краснодарском крае</text:span></text:p>
          </table:table-cell>
          <table:table-cell table:style-name="Table2.B1" office:value-type="string">
            <text:p text:style-name="P6"><text:span text:style-name="T4">Объект построен, идёт этап продаж, фокус на этом проекте как базовом кейсе.</text:span></text:p>
          </table:table-cell>
          <table:table-cell table:style-name="Table2.B1" office:value-type="string">
            <text:p text:style-name="P6"><text:span text:style-name="T4">Заказчик</text:span></text:p>
          </table:table-cell>
          <table:table-cell table:style-name="Table2.D1" office:value-type="string">
            <text:p text:style-name="P15"><text:span text:style-name="T1">Остальные проекты — в перспективе, текущий ТЗ — под этот кейс. </text:span><text:a xlink:type="simple" xlink:href="#fn41" text:style-name="ListLabel_20_614" text:visited-style-name="ListLabel_20_614"><text:span text:style-name="T2">[41]</text:span>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4">Базовая CRM — amoCRM</text:span></text:p>
          </table:table-cell>
          <table:table-cell table:style-name="Table2.B1" office:value-type="string">
            <text:p text:style-name="P6"><text:span text:style-name="T4">Использовать amoCRM, не Битрикс, из‑за интеграций с мессенджерами и сервисами (WhatsApp/Telegram, IntellectDialog, телефония).</text:span></text:p>
          </table:table-cell>
          <table:table-cell table:style-name="Table2.B1" office:value-type="string">
            <text:p text:style-name="P6"><text:span text:style-name="T4">Заказчик, поддержано командой</text:span></text:p>
          </table:table-cell>
          <table:table-cell table:style-name="Table2.D1" office:value-type="string">
            <text:p text:style-name="P15"><text:span text:style-name="T1">amoCRM — основной контур для лидов и результатов аналитики/бота. </text:span><text:a xlink:type="simple" xlink:href="#fn43" text:style-name="ListLabel_20_614" text:visited-style-name="ListLabel_20_614"><text:span text:style-name="T5">[43]</text:span></text:a><text:a xlink:type="simple" xlink:href="#fn48" text:style-name="ListLabel_20_614" text:visited-style-name="ListLabel_20_614"><text:span text:style-name="T5">[48]</text:span></text:a><text:a xlink:type="simple" xlink:href="#fn47" text:style-name="ListLabel_20_614" text:visited-style-name="ListLabel_20_614"><text:span text:style-name="T5">[47]</text:span></text:a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Фокус на нейроаналитике как первом приоритете</text:span></text:p>
          </table:table-cell>
          <table:table-cell table:style-name="Table2.B1" office:value-type="string">
            <text:p text:style-name="P6"><text:span text:style-name="T4">Сначала отстроить аналитический блок, нейропродажник — параллельно, но с меньшим охватом воронки.</text:span></text:p>
          </table:table-cell>
          <table:table-cell table:style-name="Table2.B1" office:value-type="string">
            <text:p text:style-name="P6"><text:span text:style-name="T4">Заказчик, темлид</text:span></text:p>
          </table:table-cell>
          <table:table-cell table:style-name="Table2.D1" office:value-type="string">
            <text:p text:style-name="P15"><text:span text:style-name="T1">Нейроаналитика даёт базу для осмысленной работы продажника. </text:span><text:a xlink:type="simple" xlink:href="#fn41" text:style-name="ListLabel_20_614" text:visited-style-name="ListLabel_20_614"><text:span text:style-name="T5">[41]</text:span></text:a><text:a xlink:type="simple" xlink:href="#fn40" text:style-name="ListLabel_20_614" text:visited-style-name="ListLabel_20_614"><text:span text:style-name="T5">[40]</text:span>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4">Использование Метрики/вебвизора как основного источника</text:span></text:p>
          </table:table-cell>
          <table:table-cell table:style-name="Table2.B1" office:value-type="string">
            <text:p text:style-name="P6"><text:span text:style-name="T4">Данные Метрики (включая вебвизор и тепловые карты) будут использоваться для анализа поведения и построения отчётов/триггеров.</text:span></text:p>
          </table:table-cell>
          <table:table-cell table:style-name="Table2.B1" office:value-type="string">
            <text:p text:style-name="P6"><text:span text:style-name="T4">Заказчик, команда</text:span></text:p>
          </table:table-cell>
          <table:table-cell table:style-name="Table2.D1" office:value-type="string">
            <text:p text:style-name="P15"><text:span text:style-name="T1">Важен доступ и формат выгрузки. </text:span><text:a xlink:type="simple" xlink:href="#fn42" text:style-name="ListLabel_20_614" text:visited-style-name="ListLabel_20_614"><text:span text:style-name="T5">[42]</text:span></text:a><text:a xlink:type="simple" xlink:href="#fn45" text:style-name="ListLabel_20_614" text:visited-style-name="ListLabel_20_614"><text:span text:style-name="T5">[45]</text:span></text:a><text:a xlink:type="simple" xlink:href="#fn46" text:style-name="ListLabel_20_614" text:visited-style-name="ListLabel_20_614"><text:span text:style-name="T5">[46]</text:span></text:a><text:a xlink:type="simple" xlink:href="#fn40" text:style-name="ListLabel_20_614" text:visited-style-name="ListLabel_20_614"><text:span text:style-name="T5">[40]</text:span>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4">Архитектура — модульная/мультиагентная</text:span></text:p>
          </table:table-cell>
          <table:table-cell table:style-name="Table2.B1" office:value-type="string">
            <text:p text:style-name="P6"><text:span text:style-name="T4">Выделить минимум: нейроаналитик(и), нейропродажник, оркестратор; монолит не делать.</text:span></text:p>
          </table:table-cell>
          <table:table-cell table:style-name="Table2.B1" office:value-type="string">
            <text:p text:style-name="P6"><text:span text:style-name="T4">Разработчики, темлид</text:span></text:p>
          </table:table-cell>
          <table:table-cell table:style-name="Table2.D1" office:value-type="string">
            <text:p text:style-name="P15"><text:span text:style-name="T1">Облегчает масштабирование и добавление новых агентов. </text:span><text:a xlink:type="simple" xlink:href="#fn40" text:style-name="ListLabel_20_614" text:visited-style-name="ListLabel_20_614"><text:span text:style-name="T2">[40]</text:span></text:a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Конфигурируемые пороги и точки передачи</text:span></text:p>
          </table:table-cell>
          <table:table-cell table:style-name="Table2.B1" office:value-type="string">
            <text:p text:style-name="P6"><text:span text:style-name="T4">Время на сайте, момент передачи лида менеджеру, стратегия напоминаний и допродаж должны задаваться параметрами.</text:span></text:p>
          </table:table-cell>
          <table:table-cell table:style-name="Table2.B1" office:value-type="string">
            <text:p text:style-name="P6"><text:span text:style-name="T4">Заказчик, команда</text:span></text:p>
          </table:table-cell>
          <table:table-cell table:style-name="Table2.D1" office:value-type="string">
            <text:p text:style-name="P15"><text:span text:style-name="T1">Нужны настройки per‑проект, а не жёстко зашитая логика. </text:span><text:a xlink:type="simple" xlink:href="#fn42" text:style-name="ListLabel_20_614" text:visited-style-name="ListLabel_20_614"><text:span text:style-name="T5">[42]</text:span></text:a><text:a xlink:type="simple" xlink:href="#fn44" text:style-name="ListLabel_20_614" text:visited-style-name="ListLabel_20_614"><text:span text:style-name="T5">[44]</text:span></text:a><text:a xlink:type="simple" xlink:href="#fn40" text:style-name="ListLabel_20_614" text:visited-style-name="ListLabel_20_614"><text:span text:style-name="T5">[40]</text:span>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4">Использовать исторические скрипты и переписки, но улучшать</text:span></text:p>
          </table:table-cell>
          <table:table-cell table:style-name="Table2.B1" office:value-type="string">
            <text:p text:style-name="P6"><text:span text:style-name="T4">Скрипты и диалоги заказчика — база знаний, но команда должна предлагать “человечные” альтернативы, а не копировать 1:1.</text:span></text:p>
          </table:table-cell>
          <table:table-cell table:style-name="Table2.B1" office:value-type="string">
            <text:p text:style-name="P6"><text:span text:style-name="T4">Заказчик, команда</text:span></text:p>
          </table:table-cell>
          <table:table-cell table:style-name="Table2.D1" office:value-type="string">
            <text:p text:style-name="P15"><text:span text:style-name="T1">Акцент на улучшении качества общения. </text:span><text:a xlink:type="simple" xlink:href="#fn41" text:style-name="ListLabel_20_614" text:visited-style-name="ListLabel_20_614"><text:span text:style-name="T5">[41]</text:span></text:a><text:a xlink:type="simple" xlink:href="#fn40" text:style-name="ListLabel_20_614" text:visited-style-name="ListLabel_20_614"><text:span text:style-name="T5">[40]</text:span>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4">Вопросы и материалы — через общую таблицу</text:span></text:p>
          </table:table-cell>
          <table:table-cell table:style-name="Table2.B1" office:value-type="string">
            <text:p text:style-name="P6"><text:span text:style-name="T4">Все вопросы к заказчику и запросы данных фиксируются в единой таблице, без личных “обходных” каналов.</text:span></text:p>
          </table:table-cell>
          <table:table-cell table:style-name="Table2.B1" office:value-type="string">
            <text:p text:style-name="P6"><text:span text:style-name="T4">Темлид, заказчик</text:span></text:p>
          </table:table-cell>
          <table:table-cell table:style-name="Table2.D1" office:value-type="string">
            <text:p text:style-name="P15"><text:span text:style-name="T1">Дисциплина коммуникаций. </text:span><text:a xlink:type="simple" xlink:href="#fn41" text:style-name="ListLabel_20_614" text:visited-style-name="ListLabel_20_614"><text:span text:style-name="T5">[41]</text:span></text:a><text:a xlink:type="simple" xlink:href="#fn40" text:style-name="ListLabel_20_614" text:visited-style-name="ListLabel_20_614"><text:span text:style-name="T5">[40]</text:span></text:a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Правовой блок 152‑ФЗ выносится отдельно</text:span></text:p>
          </table:table-cell>
          <table:table-cell table:style-name="Table2.B1" office:value-type="string">
            <text:p text:style-name="P6"><text:span text:style-name="T4">Будет отдельная ветка обсуждения и выработки позиции по ПД и уведомлению о боте.</text:span></text:p>
          </table:table-cell>
          <table:table-cell table:style-name="Table2.B1" office:value-type="string">
            <text:p text:style-name="P6"><text:span text:style-name="T4">Разработчики, темлид</text:span></text:p>
          </table:table-cell>
          <table:table-cell table:style-name="Table2.D1" office:value-type="string">
            <text:p text:style-name="P15"><text:span text:style-name="T1">Результат должен попасть в ТЗ в виде требований/ограничений. </text:span><text:a xlink:type="simple" xlink:href="#fn49" text:style-name="ListLabel_20_614" text:visited-style-name="ListLabel_20_614"><text:span text:style-name="T5">[49]</text:span></text:a><text:a xlink:type="simple" xlink:href="#fn50" text:style-name="ListLabel_20_614" text:visited-style-name="ListLabel_20_614"><text:span text:style-name="T5">[50]</text:span></text:a><text:a xlink:type="simple" xlink:href="#fn40" text:style-name="ListLabel_20_614" text:visited-style-name="ListLabel_20_614"><text:span text:style-name="T5">[40]</text:span></text:a></text:p>
          </table:table-cell>
        </table:table-row>
      </table:table>
      <text:p text:style-name="P7"/>
      <text:p text:style-name="P3"><text:soft-page-break/><draw:custom-shape text:anchor-type="as-char" draw:z-index="3" draw:name="Прямоугольник 3" draw:style-name="gr4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5_сроки_и_план"/><text:span text:style-name="T3">5. Сроки и план</text:span><text:bookmark-end text:name="bm_5_сроки_и_план"/></text:p>
      <text:list text:style-name="WWNum53">
        <text:list-item>
          <text:p text:style-name="P16"><text:span text:style-name="T1">Срок стажировки/проекта: 3 месяца — в этой рамке ожидается прототип системы (нейроаналитик + нейропродажник) на пилотном кейсе. Тип срока: ориентировочный, рамка программы.</text:span><text:bookmark text:name="fnref41_16"/><text:a xlink:type="simple" xlink:href="#fn41" text:style-name="ListLabel_20_613" text:visited-style-name="ListLabel_20_613"><text:span text:style-name="T2">[41]</text:span></text:a></text:p>
        </text:list-item>
        <text:list-item>
          <text:p text:style-name="P16"><text:span text:style-name="T1">На ближайшую неделю команда должна: переработать архитектурные схемы с учётом встречи, консолидировать одну целевую архитектуру и заполнить таблицу вопросами/запросами материалов. Тип: ориентировочный.</text:span><text:bookmark text:name="fnref40_35"/><text:a xlink:type="simple" xlink:href="#fn40" text:style-name="ListLabel_20_613" text:visited-style-name="ListLabel_20_613"><text:span text:style-name="T2">[40]</text:span></text:a></text:p>
        </text:list-item>
        <text:list-item>
          <text:p text:style-name="P16"><text:span text:style-name="T1">Заказчик в ближайшее время: предоставить ссылку на сайт (уже сделано), примеры отчётов/видео Метрики, схему текущего бизнес‑процесса движения клиента и данные по IntellectDialog. Тип: ориентировочный.</text:span><text:bookmark text:name="fnref41_17"/><text:a xlink:type="simple" xlink:href="#fn41" text:style-name="ListLabel_20_613" text:visited-style-name="ListLabel_20_613"><text:span text:style-name="T2">[41]</text:span></text:a><text:bookmark text:name="fnref40_36"/><text:a xlink:type="simple" xlink:href="#fn40" text:style-name="ListLabel_20_613" text:visited-style-name="ListLabel_20_613"><text:span text:style-name="T2">[40]</text:span></text:a></text:p>
        </text:list-item>
      </text:list>
      <text:p text:style-name="P3"><draw:custom-shape text:anchor-type="as-char" draw:z-index="4" draw:name="Прямоугольник 2" draw:style-name="gr5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6_заготовка_структуры_тз"/><text:span text:style-name="T3">6. Заготовка структуры ТЗ</text:span><text:bookmark-end text:name="bm_6_заготовка_структуры_тз"/></text:p>
      <text:p text:style-name="P5"><text:bookmark-start text:name="раздел_1_цели_и_задачи_проекта"/><text:span text:style-name="T3">Раздел 1. Цели и задачи проекта</text:span><text:bookmark-end text:name="раздел_1_цели_и_задачи_проекта"/></text:p>
      <text:p text:style-name="P2"><text:soft-page-break/><text:span text:style-name="T1">1.1. Разработать прототип системы, объединяющей модуль нейроаналитики и модуль нейропродажника для увеличения эффективности продаж коттеджного посёлка застройщика и снижения потерь лидов. (Требуется уточнение целевых KPI: рост конверсии, снижение CPL и т.п.)</text:span><text:bookmark text:name="fnref41_18"/><text:a xlink:type="simple" xlink:href="#fn41" text:style-name="ListLabel_20_613" text:visited-style-name="ListLabel_20_613"><text:span text:style-name="T2">[41]</text:span></text:a><text:span text:style-name="T1"><text:line-break/>1.2. Обеспечить возможность адаптации решения к другим отраслям за счёт модульной архитектуры и настраиваемых баз знаний и порогов.</text:span><text:bookmark text:name="fnref40_37"/><text:a xlink:type="simple" xlink:href="#fn40" text:style-name="ListLabel_20_613" text:visited-style-name="ListLabel_20_613"><text:span text:style-name="T2">[40]</text:span></text:a><text:bookmark text:name="fnref41_19"/><text:a xlink:type="simple" xlink:href="#fn41" text:style-name="ListLabel_20_613" text:visited-style-name="ListLabel_20_613"><text:span text:style-name="T2">[41]</text:span></text:a><text:span text:style-name="T1"><text:line-break/>1.3. Создать основу для дальнейшего расширения продукта (прогнозирование, нейроконтроллер, голосовые интерфейсы) без полной переработки ядра.</text:span><text:bookmark text:name="fnref40_38"/><text:a xlink:type="simple" xlink:href="#fn40" text:style-name="ListLabel_20_613" text:visited-style-name="ListLabel_20_613"><text:span text:style-name="T2">[40]</text:span></text:a></text:p>
      <text:p text:style-name="P5"><text:bookmark-start text:name="раздел_2_описание_продукта_системы"/><text:span text:style-name="T3">Раздел 2. Описание продукта / системы</text:span><text:bookmark-end text:name="раздел_2_описание_продукта_системы"/></text:p>
      <text:p text:style-name="P17"><text:span text:style-name="T4">2.1. Система реализуется в виде набора нейроагентов:</text:span></text:p>
      <text:list text:style-name="WWNum54">
        <text:list-item>
          <text:p text:style-name="P18"><text:span text:style-name="T4">нейроаналитики (онлайн и офлайн/CRM),</text:span></text:p>
        </text:list-item>
        <text:list-item>
          <text:p text:style-name="P18"><text:span text:style-name="T4">нейропродажник,</text:span></text:p>
        </text:list-item>
        <text:list-item>
          <text:p text:style-name="P19"><text:span text:style-name="T1">оркестратор, координирующий обмен данными и вызов агентов.</text:span><text:bookmark text:name="fnref40_39"/><text:a xlink:type="simple" xlink:href="#fn40" text:style-name="ListLabel_20_613" text:visited-style-name="ListLabel_20_613"><text:span text:style-name="T2">[40]</text:span></text:a></text:p>
        </text:list-item>
      </text:list>
      <text:p text:style-name="P17"><text:span text:style-name="T4">2.2. Источниками данных являются:</text:span></text:p>
      <text:list text:style-name="WWNum55">
        <text:list-item>
          <text:p text:style-name="P20"><text:soft-page-break/><text:span text:style-name="T4">сайт застройщика с подключённой Яндекс.Метрикой/вебвизором и Яндекс.Директом;</text:span></text:p>
        </text:list-item>
        <text:list-item>
          <text:p text:style-name="P20"><text:span text:style-name="T4">amoCRM (лиды, сделки, источники, стадии, задачи);</text:span></text:p>
        </text:list-item>
        <text:list-item>
          <text:p text:style-name="P21"><text:span text:style-name="T1">при наличии — сервис IntellectDialog и другие интеграции (Avito, мессенджеры, телефония).</text:span><text:bookmark text:name="fnref46_3"/><text:a xlink:type="simple" xlink:href="#fn46" text:style-name="ListLabel_20_613" text:visited-style-name="ListLabel_20_613"><text:span text:style-name="T2">[46]</text:span></text:a><text:bookmark text:name="fnref45_3"/><text:a xlink:type="simple" xlink:href="#fn45" text:style-name="ListLabel_20_613" text:visited-style-name="ListLabel_20_613"><text:span text:style-name="T2">[45]</text:span></text:a><text:bookmark text:name="fnref43_5"/><text:a xlink:type="simple" xlink:href="#fn43" text:style-name="ListLabel_20_613" text:visited-style-name="ListLabel_20_613"><text:span text:style-name="T2">[43]</text:span></text:a><text:bookmark text:name="fnref42_7"/><text:a xlink:type="simple" xlink:href="#fn42" text:style-name="ListLabel_20_613" text:visited-style-name="ListLabel_20_613"><text:span text:style-name="T2">[42]</text:span></text:a><text:bookmark text:name="fnref40_40"/><text:a xlink:type="simple" xlink:href="#fn40" text:style-name="ListLabel_20_613" text:visited-style-name="ListLabel_20_613"><text:span text:style-name="T2">[40]</text:span></text:a></text:p>
        </text:list-item>
      </text:list>
      <text:p text:style-name="P17"><text:span text:style-name="T4">2.3. Система должна поддерживать два режима аналитики:</text:span></text:p>
      <text:list text:style-name="WWNum56">
        <text:list-item>
          <text:p text:style-name="P22"><text:span text:style-name="T4">оперативный (почти онлайн) для реакций на текущие действия посетителей;</text:span></text:p>
        </text:list-item>
        <text:list-item>
          <text:p text:style-name="P23"><text:span text:style-name="T1">периодический (еженедельные/ежемесячные срезы) для стратегических решений по маркетингу и продажам.</text:span><text:bookmark text:name="fnref44_6"/><text:a xlink:type="simple" xlink:href="#fn44" text:style-name="ListLabel_20_613" text:visited-style-name="ListLabel_20_613"><text:span text:style-name="T2">[44]</text:span></text:a><text:bookmark text:name="fnref41_20"/><text:a xlink:type="simple" xlink:href="#fn41" text:style-name="ListLabel_20_613" text:visited-style-name="ListLabel_20_613"><text:span text:style-name="T2">[41]</text:span></text:a><text:bookmark text:name="fnref40_41"/><text:a xlink:type="simple" xlink:href="#fn40" text:style-name="ListLabel_20_613" text:visited-style-name="ListLabel_20_613"><text:span text:style-name="T2">[40]</text:span></text:a></text:p>
        </text:list-item>
      </text:list>
      <text:p text:style-name="P5"><text:bookmark-start text:name="раздел_3_функциональные_требования"/><text:span text:style-name="T3">Раздел 3. Функциональные требования</text:span><text:bookmark-end text:name="раздел_3_функциональные_требования"/></text:p>
      <text:p text:style-name="P2"><text:span text:style-name="T1">3.1. Модуль нейроаналитики (онлайн)<text:line-break/>3.1.1. Получать события и агрегированные отчёты из Яндекс.Метрики/вебвизора (страницы, клики, цели, сегменты, время, география) с минимальной задержкой.</text:span><text:bookmark text:name="fnref45_4"/><text:a xlink:type="simple" xlink:href="#fn45" text:style-name="ListLabel_20_613" text:visited-style-name="ListLabel_20_613"><text:span text:style-name="T2">[45]</text:span></text:a><text:bookmark text:name="fnref46_4"/><text:a xlink:type="simple" xlink:href="#fn46" text:style-name="ListLabel_20_613" text:visited-style-name="ListLabel_20_613"><text:span text:style-name="T2">[46]</text:span></text:a><text:bookmark text:name="fnref42_8"/><text:a xlink:type="simple" xlink:href="#fn42" text:style-name="ListLabel_20_613" text:visited-style-name="ListLabel_20_613"><text:span text:style-name="T2">[42]</text:span></text:a><text:bookmark text:name="fnref40_42"/><text:a xlink:type="simple" xlink:href="#fn40" text:style-name="ListLabel_20_613" text:visited-style-name="ListLabel_20_613"><text:span text:style-name="T2">[40]</text:span></text:a><text:span text:style-name="T1"><text:line-break/>3.1.2. Определять ключевые паттерны поведения (интерес к определённым объектам/разделам, глубина просмотра, “зависание” на элементах) и выделять события, требующие </text:span><text:soft-page-break/><text:span text:style-name="T1">быстрого реагирования. (Требуется уточнение перечня паттернов.)</text:span><text:bookmark text:name="fnref45_5"/><text:a xlink:type="simple" xlink:href="#fn45" text:style-name="ListLabel_20_613" text:visited-style-name="ListLabel_20_613"><text:span text:style-name="T2">[45]</text:span></text:a><text:bookmark text:name="fnref40_43"/><text:a xlink:type="simple" xlink:href="#fn40" text:style-name="ListLabel_20_613" text:visited-style-name="ListLabel_20_613"><text:span text:style-name="T2">[40]</text:span></text:a><text:span text:style-name="T1"><text:line-break/>3.1.3. Передавать нейропродажнику консолидированный контекст по конкретным визитам/лидам для формирования персонального предложения.</text:span><text:bookmark text:name="fnref40_44"/><text:a xlink:type="simple" xlink:href="#fn40" text:style-name="ListLabel_20_613" text:visited-style-name="ListLabel_20_613"><text:span text:style-name="T2">[40]</text:span></text:a></text:p>
      <text:p text:style-name="P2"><text:span text:style-name="T1">3.2. Модуль нейроаналитики (офлайн/CRM)<text:line-break/>3.2.1. Анализировать данные CRM о лидах, сделках, источниках, стадиях и истории взаимодействий, включая лиды из Авито и других каналов.</text:span><text:bookmark text:name="fnref48_4"/><text:a xlink:type="simple" xlink:href="#fn48" text:style-name="ListLabel_20_613" text:visited-style-name="ListLabel_20_613"><text:span text:style-name="T2">[48]</text:span></text:a><text:bookmark text:name="fnref43_6"/><text:a xlink:type="simple" xlink:href="#fn43" text:style-name="ListLabel_20_613" text:visited-style-name="ListLabel_20_613"><text:span text:style-name="T2">[43]</text:span></text:a><text:bookmark text:name="fnref40_45"/><text:a xlink:type="simple" xlink:href="#fn40" text:style-name="ListLabel_20_613" text:visited-style-name="ListLabel_20_613"><text:span text:style-name="T2">[40]</text:span></text:a><text:span text:style-name="T1"><text:line-break/>3.2.2. Рассчитывать конверсии по каналам и стадиям воронки, строить отчёты по эффективности каналов (CPL, CPA, LTV, скорость реакции и т.п.). (Требуется уточнение списка KPI.)</text:span><text:bookmark text:name="fnref42_9"/><text:a xlink:type="simple" xlink:href="#fn42" text:style-name="ListLabel_20_613" text:visited-style-name="ListLabel_20_613"><text:span text:style-name="T2">[42]</text:span></text:a><text:bookmark text:name="fnref44_7"/><text:a xlink:type="simple" xlink:href="#fn44" text:style-name="ListLabel_20_613" text:visited-style-name="ListLabel_20_613"><text:span text:style-name="T2">[44]</text:span></text:a><text:span text:style-name="T1"><text:line-break/>3.2.3. Формировать рекомендации по перераспределению рекламного бюджета и улучшению рекламных материалов с учётом ЦА каналов и креативов.</text:span><text:bookmark text:name="fnref50_4"/><text:a xlink:type="simple" xlink:href="#fn50" text:style-name="ListLabel_20_613" text:visited-style-name="ListLabel_20_613"><text:span text:style-name="T2">[50]</text:span></text:a><text:bookmark text:name="fnref44_8"/><text:a xlink:type="simple" xlink:href="#fn44" text:style-name="ListLabel_20_613" text:visited-style-name="ListLabel_20_613"><text:span text:style-name="T2">[44]</text:span></text:a><text:bookmark text:name="fnref42_10"/><text:a xlink:type="simple" xlink:href="#fn42" text:style-name="ListLabel_20_613" text:visited-style-name="ListLabel_20_613"><text:span text:style-name="T2">[42]</text:span></text:a></text:p>
      <text:p text:style-name="P2"><text:span text:style-name="T1">3.3. Модуль нейропродажника<text:line-break/>3.3.1. При наступлении определённых точек касания (кнопка на сайте, цель, событие в CRM) инициировать текстовый диалог или отправку коммерческого предложения выбранным каналом. (Требуется уточнение точек касания.)</text:span><text:bookmark text:name="fnref41_21"/><text:soft-page-break/><text:a xlink:type="simple" xlink:href="#fn41" text:style-name="ListLabel_20_613" text:visited-style-name="ListLabel_20_613"><text:span text:style-name="T2">[41]</text:span></text:a><text:bookmark text:name="fnref40_46"/><text:a xlink:type="simple" xlink:href="#fn40" text:style-name="ListLabel_20_613" text:visited-style-name="ListLabel_20_613"><text:span text:style-name="T2">[40]</text:span></text:a><text:span text:style-name="T1"><text:line-break/>3.3.2. Генерировать предложения и ответы, опираясь на: контекст сессии сайта, данные CRM (объекты, ЦА, история), скрипты и исторические диалоги.</text:span><text:bookmark text:name="fnref47_7"/><text:a xlink:type="simple" xlink:href="#fn47" text:style-name="ListLabel_20_613" text:visited-style-name="ListLabel_20_613"><text:span text:style-name="T2">[47]</text:span></text:a><text:bookmark text:name="fnref41_22"/><text:a xlink:type="simple" xlink:href="#fn41" text:style-name="ListLabel_20_613" text:visited-style-name="ListLabel_20_613"><text:span text:style-name="T2">[41]</text:span></text:a><text:bookmark text:name="fnref40_47"/><text:a xlink:type="simple" xlink:href="#fn40" text:style-name="ListLabel_20_613" text:visited-style-name="ListLabel_20_613"><text:span text:style-name="T2">[40]</text:span></text:a><text:span text:style-name="T1"><text:line-break/>3.3.3. Вести диалог в стиле живого специалиста, корректно обходя вопросы без ответов и не раскрывая внутреннюю логику системы.</text:span><text:bookmark text:name="fnref47_8"/><text:a xlink:type="simple" xlink:href="#fn47" text:style-name="ListLabel_20_613" text:visited-style-name="ListLabel_20_613"><text:span text:style-name="T2">[47]</text:span></text:a><text:bookmark text:name="fnref40_48"/><text:a xlink:type="simple" xlink:href="#fn40" text:style-name="ListLabel_20_613" text:visited-style-name="ListLabel_20_613"><text:span text:style-name="T2">[40]</text:span></text:a><text:span text:style-name="T1"><text:line-break/>3.3.4. Определять моменты передачи лида менеджеру (по заранее заданным условиям) и формировать резюме диалога, оценку “теплоты” и рекомендации менеджеру, записывая их в CRM. (Критерии передачи — Требуется уточнение.)</text:span><text:bookmark text:name="fnref43_7"/><text:a xlink:type="simple" xlink:href="#fn43" text:style-name="ListLabel_20_613" text:visited-style-name="ListLabel_20_613"><text:span text:style-name="T2">[43]</text:span></text:a><text:bookmark text:name="fnref48_5"/><text:a xlink:type="simple" xlink:href="#fn48" text:style-name="ListLabel_20_613" text:visited-style-name="ListLabel_20_613"><text:span text:style-name="T2">[48]</text:span></text:a><text:bookmark text:name="fnref40_49"/><text:a xlink:type="simple" xlink:href="#fn40" text:style-name="ListLabel_20_613" text:visited-style-name="ListLabel_20_613"><text:span text:style-name="T2">[40]</text:span></text:a></text:p>
      <text:p text:style-name="P2"><text:span text:style-name="T1">3.4. Общие функции<text:line-break/>3.4.1. Поддерживать конфигурируемые пороги: минимальное время на сайте для признания лида, количество и тип событий для отнесения к “горячим”, схемы напоминаний и допродаж.</text:span><text:bookmark text:name="fnref44_9"/><text:a xlink:type="simple" xlink:href="#fn44" text:style-name="ListLabel_20_613" text:visited-style-name="ListLabel_20_613"><text:span text:style-name="T2">[44]</text:span></text:a><text:bookmark text:name="fnref42_11"/><text:a xlink:type="simple" xlink:href="#fn42" text:style-name="ListLabel_20_613" text:visited-style-name="ListLabel_20_613"><text:span text:style-name="T2">[42]</text:span></text:a><text:bookmark text:name="fnref40_50"/><text:a xlink:type="simple" xlink:href="#fn40" text:style-name="ListLabel_20_613" text:visited-style-name="ListLabel_20_613"><text:span text:style-name="T2">[40]</text:span></text:a><text:span text:style-name="T1"><text:line-break/>3.4.2. Обрабатывать лидов из офлайн‑каналов (Авито, рекомендации, ручной ввод) по упрощённому сценарию с использованием данных CRM, а при наличии связки с сайтом — дополнять их поведенческой аналитикой.</text:span><text:bookmark text:name="fnref48_6"/><text:a xlink:type="simple" xlink:href="#fn48" text:style-name="ListLabel_20_613" text:visited-style-name="ListLabel_20_613"><text:span text:style-name="T2">[48]</text:span></text:a><text:bookmark text:name="fnref43_8"/><text:a xlink:type="simple" xlink:href="#fn43" text:style-name="ListLabel_20_613" text:visited-style-name="ListLabel_20_613"><text:span text:style-name="T2">[43]</text:span></text:a><text:bookmark text:name="fnref40_51"/><text:a xlink:type="simple" xlink:href="#fn40" text:style-name="ListLabel_20_613" text:visited-style-name="ListLabel_20_613"><text:span text:style-name="T2">[40]</text:span></text:a></text:p>
      <text:p text:style-name="P5"><text:bookmark-start text:name="раздел_4_нефункциональные_требования"/><text:soft-page-break/><text:span text:style-name="T3">Раздел 4. Нефункциональные требования</text:span><text:bookmark-end text:name="раздел_4_нефункциональные_требования"/></text:p>
      <text:p text:style-name="P2"><text:span text:style-name="T1">4.1. Время реакции системы на горячие события (действие пользователя + аналитика + инициирование действия) должно быть не более N минут (конкретное значение — Требуется уточнение).</text:span><text:bookmark text:name="fnref42_12"/><text:a xlink:type="simple" xlink:href="#fn42" text:style-name="ListLabel_20_613" text:visited-style-name="ListLabel_20_613"><text:span text:style-name="T2">[42]</text:span></text:a><text:bookmark text:name="fnref44_10"/><text:a xlink:type="simple" xlink:href="#fn44" text:style-name="ListLabel_20_613" text:visited-style-name="ListLabel_20_613"><text:span text:style-name="T2">[44]</text:span></text:a><text:bookmark text:name="fnref40_52"/><text:a xlink:type="simple" xlink:href="#fn40" text:style-name="ListLabel_20_613" text:visited-style-name="ListLabel_20_613"><text:span text:style-name="T2">[40]</text:span></text:a><text:span text:style-name="T1"><text:line-break/>4.2. Система должна обеспечивать человекоподобность диалогов (отсутствие шаблонных “роботизированных” формулировок, уместность предложений и акций). (Нужны качественные критерии/примеры — Требуется уточнение.)</text:span><text:bookmark text:name="fnref47_9"/><text:a xlink:type="simple" xlink:href="#fn47" text:style-name="ListLabel_20_613" text:visited-style-name="ListLabel_20_613"><text:span text:style-name="T2">[47]</text:span></text:a><text:bookmark text:name="fnref40_53"/><text:a xlink:type="simple" xlink:href="#fn40" text:style-name="ListLabel_20_613" text:visited-style-name="ListLabel_20_613"><text:span text:style-name="T2">[40]</text:span></text:a><text:span text:style-name="T1"><text:line-break/>4.3. Архитектура должна позволять независимое масштабирование модулей (аналитика, продажи, прогноз, контроль) и замену моделей LLM/STT/TTS без изменения бизнес‑логики.</text:span><text:bookmark text:name="fnref49_5"/><text:a xlink:type="simple" xlink:href="#fn49" text:style-name="ListLabel_20_613" text:visited-style-name="ListLabel_20_613"><text:span text:style-name="T2">[49]</text:span></text:a><text:bookmark text:name="fnref50_5"/><text:a xlink:type="simple" xlink:href="#fn50" text:style-name="ListLabel_20_613" text:visited-style-name="ListLabel_20_613"><text:span text:style-name="T2">[50]</text:span></text:a><text:bookmark text:name="fnref40_54"/><text:a xlink:type="simple" xlink:href="#fn40" text:style-name="ListLabel_20_613" text:visited-style-name="ListLabel_20_613"><text:span text:style-name="T2">[40]</text:span></text:a></text:p>
      <text:p text:style-name="P5"><text:bookmark-start text:name="раздел_5_интеграции"/><text:span text:style-name="T3">Раздел 5. Интеграции</text:span><text:bookmark-end text:name="раздел_5_интеграции"/></text:p>
      <text:p text:style-name="P2"><text:span text:style-name="T1">5.1. Интеграция с API Яндекс.Метрики/вебвизора для загрузки данных о поведении и событиях, включая параметры таргетинга (гео, возраст, источники, цели) при наличии.</text:span><text:bookmark text:name="fnref46_5"/><text:a xlink:type="simple" xlink:href="#fn46" text:style-name="ListLabel_20_613" text:visited-style-name="ListLabel_20_613"><text:span text:style-name="T2">[46]</text:span></text:a><text:bookmark text:name="fnref45_6"/><text:a xlink:type="simple" xlink:href="#fn45" text:style-name="ListLabel_20_613" text:visited-style-name="ListLabel_20_613"><text:span text:style-name="T2">[45]</text:span></text:a><text:bookmark text:name="fnref42_13"/><text:a xlink:type="simple" xlink:href="#fn42" text:style-name="ListLabel_20_613" text:visited-style-name="ListLabel_20_613"><text:span text:style-name="T2">[42]</text:span></text:a><text:bookmark text:name="fnref40_55"/><text:a xlink:type="simple" xlink:href="#fn40" text:style-name="ListLabel_20_613" text:visited-style-name="ListLabel_20_613"><text:span text:style-name="T2">[40]</text:span></text:a><text:span text:style-name="T1"><text:line-break/>5.2. Интеграция с amoCRM: чтение лидов, сделок, источников, </text:span><text:soft-page-break/><text:span text:style-name="T1">стадий и запись результатов работы нейроагентов (резюме, оценка “теплоты”, теги, задачи, чек‑поинты).</text:span><text:bookmark text:name="fnref51_1"/><text:a xlink:type="simple" xlink:href="#fn51" text:style-name="ListLabel_20_613" text:visited-style-name="ListLabel_20_613"><text:span text:style-name="T2">[51]</text:span></text:a><text:bookmark text:name="fnref43_9"/><text:a xlink:type="simple" xlink:href="#fn43" text:style-name="ListLabel_20_613" text:visited-style-name="ListLabel_20_613"><text:span text:style-name="T2">[43]</text:span></text:a><text:bookmark text:name="fnref48_7"/><text:a xlink:type="simple" xlink:href="#fn48" text:style-name="ListLabel_20_613" text:visited-style-name="ListLabel_20_613"><text:span text:style-name="T2">[48]</text:span></text:a><text:bookmark text:name="fnref40_56"/><text:a xlink:type="simple" xlink:href="#fn40" text:style-name="ListLabel_20_613" text:visited-style-name="ListLabel_20_613"><text:span text:style-name="T2">[40]</text:span></text:a><text:span text:style-name="T1"><text:line-break/>5.3. Интеграция с сервисом IntellectDialog (опционально) как с источником телефонов и, при необходимости, транскриптов звонков; отказоустойчивость системы при отсутствии или сбое этого сервиса.</text:span><text:bookmark text:name="fnref47_10"/><text:a xlink:type="simple" xlink:href="#fn47" text:style-name="ListLabel_20_613" text:visited-style-name="ListLabel_20_613"><text:span text:style-name="T2">[47]</text:span></text:a><text:bookmark text:name="fnref40_57"/><text:a xlink:type="simple" xlink:href="#fn40" text:style-name="ListLabel_20_613" text:visited-style-name="ListLabel_20_613"><text:span text:style-name="T2">[40]</text:span></text:a><text:span text:style-name="T1"><text:line-break/>5.4. Интеграция с каналами коммуникации (Telegram, Авито‑чат, SMS, IP‑телефония и др.) для отправки и приёма сообщений; базовый список каналов и приоритеты — Требуется уточнение.</text:span><text:bookmark text:name="fnref43_10"/><text:a xlink:type="simple" xlink:href="#fn43" text:style-name="ListLabel_20_613" text:visited-style-name="ListLabel_20_613"><text:span text:style-name="T2">[43]</text:span></text:a><text:bookmark text:name="fnref48_8"/><text:a xlink:type="simple" xlink:href="#fn48" text:style-name="ListLabel_20_613" text:visited-style-name="ListLabel_20_613"><text:span text:style-name="T2">[48]</text:span></text:a><text:bookmark text:name="fnref40_58"/><text:a xlink:type="simple" xlink:href="#fn40" text:style-name="ListLabel_20_613" text:visited-style-name="ListLabel_20_613"><text:span text:style-name="T2">[40]</text:span></text:a></text:p>
      <text:p text:style-name="P5"><text:bookmark-start text:name="раздел_6_ограничения_и_допущения"/><text:span text:style-name="T3">Раздел 6. Ограничения и допущения</text:span><text:bookmark-end text:name="раздел_6_ограничения_и_допущения"/></text:p>
      <text:p text:style-name="P2"><text:span text:style-name="T1">6.1. В качестве CRM в пилотном проекте используется только amoCRM; поддержка других CRM не входит в текущий объём.</text:span><text:bookmark text:name="fnref48_9"/><text:a xlink:type="simple" xlink:href="#fn48" text:style-name="ListLabel_20_613" text:visited-style-name="ListLabel_20_613"><text:span text:style-name="T2">[48]</text:span></text:a><text:bookmark text:name="fnref43_11"/><text:a xlink:type="simple" xlink:href="#fn43" text:style-name="ListLabel_20_613" text:visited-style-name="ListLabel_20_613"><text:span text:style-name="T2">[43]</text:span></text:a><text:span text:style-name="T1"><text:line-break/>6.2. Передача персональных данных (телефоны, ФИО, адреса, аудио/тексты диалогов) в зарубежные облачные сервисы LLM недопустима без обезличивания и/или специальных юридических оснований.</text:span><text:bookmark text:name="fnref52_1"/><text:a xlink:type="simple" xlink:href="#fn52" text:style-name="ListLabel_20_613" text:visited-style-name="ListLabel_20_613"><text:span text:style-name="T2">[52]</text:span></text:a><text:bookmark text:name="fnref54_2"/><text:a xlink:type="simple" xlink:href="#fn54" text:style-name="ListLabel_20_613" text:visited-style-name="ListLabel_20_613"><text:span text:style-name="T2">[54]</text:span></text:a><text:bookmark text:name="fnref50_6"/><text:a xlink:type="simple" xlink:href="#fn50" text:style-name="ListLabel_20_613" text:visited-style-name="ListLabel_20_613"><text:span text:style-name="T2">[50]</text:span></text:a><text:bookmark text:name="fnref49_6"/><text:a xlink:type="simple" xlink:href="#fn49" text:style-name="ListLabel_20_613" text:visited-style-name="ListLabel_20_613"><text:span text:style-name="T2">[49]</text:span></text:a><text:bookmark text:name="fnref40_59"/><text:a xlink:type="simple" xlink:href="#fn40" text:style-name="ListLabel_20_613" text:visited-style-name="ListLabel_20_613"><text:span text:style-name="T2">[40]</text:span></text:a><text:span text:style-name="T1"><text:line-break/>6.3. Механизм определения телефонов посетителей сайта сторонними сервисами (IntellectDialog) рассматривается как </text:span><text:soft-page-break/><text:span text:style-name="T1">“чёрный ящик” на стороне заказчика; система должна оставаться работоспособной при его отключении.</text:span><text:bookmark text:name="fnref47_11"/><text:a xlink:type="simple" xlink:href="#fn47" text:style-name="ListLabel_20_613" text:visited-style-name="ListLabel_20_613"><text:span text:style-name="T2">[47]</text:span></text:a><text:bookmark text:name="fnref40_60"/><text:a xlink:type="simple" xlink:href="#fn40" text:style-name="ListLabel_20_613" text:visited-style-name="ListLabel_20_613"><text:span text:style-name="T2">[40]</text:span></text:a></text:p>
      <text:p text:style-name="P5"><text:bookmark-start text:name="раздел_7_риски"/><text:span text:style-name="T3">Раздел 7. Риски</text:span><text:bookmark-end text:name="раздел_7_риски"/></text:p>
      <text:p text:style-name="P2"><text:span text:style-name="T1">7.1. Нарушение законодательства о персональных данных (152‑ФЗ) при некорректной передаче и хранении данных (особенно в облачных LLM) и/или при непрозрачной работе сторонних сервисов.</text:span><text:bookmark text:name="fnref53_1"/><text:a xlink:type="simple" xlink:href="#fn53" text:style-name="ListLabel_20_613" text:visited-style-name="ListLabel_20_613"><text:span text:style-name="T2">[53]</text:span></text:a><text:bookmark text:name="fnref52_2"/><text:a xlink:type="simple" xlink:href="#fn52" text:style-name="ListLabel_20_613" text:visited-style-name="ListLabel_20_613"><text:span text:style-name="T2">[52]</text:span></text:a><text:bookmark text:name="fnref54_3"/><text:a xlink:type="simple" xlink:href="#fn54" text:style-name="ListLabel_20_613" text:visited-style-name="ListLabel_20_613"><text:span text:style-name="T2">[54]</text:span></text:a><text:bookmark text:name="fnref50_7"/><text:a xlink:type="simple" xlink:href="#fn50" text:style-name="ListLabel_20_613" text:visited-style-name="ListLabel_20_613"><text:span text:style-name="T2">[50]</text:span></text:a><text:bookmark text:name="fnref49_7"/><text:a xlink:type="simple" xlink:href="#fn49" text:style-name="ListLabel_20_613" text:visited-style-name="ListLabel_20_613"><text:span text:style-name="T2">[49]</text:span></text:a><text:bookmark text:name="fnref40_61"/><text:a xlink:type="simple" xlink:href="#fn40" text:style-name="ListLabel_20_613" text:visited-style-name="ListLabel_20_613"><text:span text:style-name="T2">[40]</text:span></text:a><text:span text:style-name="T1"><text:line-break/>7.2. Потеря лидов из‑за ошибок в интеграциях и триггерах (неправильно настроенные пороги, отвалившиеся вебхуки, дубли/пропуски событий).</text:span><text:bookmark text:name="fnref41_23"/><text:a xlink:type="simple" xlink:href="#fn41" text:style-name="ListLabel_20_613" text:visited-style-name="ListLabel_20_613"><text:span text:style-name="T2">[41]</text:span></text:a><text:bookmark text:name="fnref40_62"/><text:a xlink:type="simple" xlink:href="#fn40" text:style-name="ListLabel_20_613" text:visited-style-name="ListLabel_20_613"><text:span text:style-name="T2">[40]</text:span></text:a><text:span text:style-name="T1"><text:line-break/>7.3. Низкое качество диалогов нейропродажника, вызывающее раздражение клиентов и ухудшение конверсии.</text:span><text:bookmark text:name="fnref47_12"/><text:a xlink:type="simple" xlink:href="#fn47" text:style-name="ListLabel_20_613" text:visited-style-name="ListLabel_20_613"><text:span text:style-name="T2">[47]</text:span></text:a><text:bookmark text:name="fnref40_63"/><text:a xlink:type="simple" xlink:href="#fn40" text:style-name="ListLabel_20_613" text:visited-style-name="ListLabel_20_613"><text:span text:style-name="T2">[40]</text:span></text:a><text:span text:style-name="T1"><text:line-break/>7.4. Рассинхрон ожиданий по “магии онлайн‑аналитики” и реальным ограничениям Метрики/CRM и каналов (не все посетители идентифицируются, неполные данные по действиям).</text:span><text:bookmark text:name="fnref40_64"/><text:a xlink:type="simple" xlink:href="#fn40" text:style-name="ListLabel_20_613" text:visited-style-name="ListLabel_20_613"><text:span text:style-name="T2">[40]</text:span></text:a></text:p>
      <text:p text:style-name="P5"><text:bookmark-start text:name="раздел_8_план_работ_и_сроки"/><text:span text:style-name="T3">Раздел 8. План работ и сроки</text:span><text:bookmark-end text:name="раздел_8_план_работ_и_сроки"/></text:p>
      <text:p text:style-name="P17"><text:span text:style-name="T4">8.1. Этап 1 (0–1 месяц):</text:span></text:p>
      <text:list text:style-name="WWNum57">
        <text:list-item>
          <text:p text:style-name="P24"><text:soft-page-break/><text:span text:style-name="T4">Сбор и формализация бизнес‑процессов (схема воронки, точки касания, каналы);</text:span></text:p>
        </text:list-item>
        <text:list-item>
          <text:p text:style-name="P24"><text:span text:style-name="T4">Получение и анализ текущих данных Метрики/CRM;</text:span></text:p>
        </text:list-item>
        <text:list-item>
          <text:p text:style-name="P25"><text:span text:style-name="T1">Уточнение правового контура по ПД и выбор архитектурного варианта моделей. (Даты — Требуется уточнение.)</text:span><text:bookmark text:name="fnref41_24"/><text:a xlink:type="simple" xlink:href="#fn41" text:style-name="ListLabel_20_613" text:visited-style-name="ListLabel_20_613"><text:span text:style-name="T2">[41]</text:span></text:a><text:bookmark text:name="fnref40_65"/><text:a xlink:type="simple" xlink:href="#fn40" text:style-name="ListLabel_20_613" text:visited-style-name="ListLabel_20_613"><text:span text:style-name="T2">[40]</text:span></text:a></text:p>
        </text:list-item>
      </text:list>
      <text:p text:style-name="P17"><text:span text:style-name="T4">8.2. Этап 2 (1–2 месяц):</text:span></text:p>
      <text:list text:style-name="WWNum58">
        <text:list-item>
          <text:p text:style-name="P26"><text:span text:style-name="T4">Реализация первого прототипа нейроаналитика (офлайн + базовый онлайн);</text:span></text:p>
        </text:list-item>
        <text:list-item>
          <text:p text:style-name="P26"><text:span text:style-name="T4">Реализация первого прототипа нейропродажника с интеграцией в один канал (например, Telegram или сайт‑виджет);</text:span></text:p>
        </text:list-item>
        <text:list-item>
          <text:p text:style-name="P27"><text:span text:style-name="T1">Интеграция с amoCRM и базовый обмен данными. (Требуется уточнение.)</text:span><text:bookmark text:name="fnref40_66"/><text:a xlink:type="simple" xlink:href="#fn40" text:style-name="ListLabel_20_613" text:visited-style-name="ListLabel_20_613"><text:span text:style-name="T2">[40]</text:span></text:a></text:p>
        </text:list-item>
      </text:list>
      <text:p text:style-name="P17"><text:span text:style-name="T4">8.3. Этап 3 (2–3 месяц):</text:span></text:p>
      <text:list text:style-name="WWNum59">
        <text:list-item>
          <text:p text:style-name="P28"><text:span text:style-name="T4">Доработка логики триггеров и порогов;</text:span></text:p>
        </text:list-item>
        <text:list-item>
          <text:p text:style-name="P28"><text:span text:style-name="T4">Подключение дополнительных каналов и сценариев допродаж;</text:span></text:p>
        </text:list-item>
        <text:list-item>
          <text:p text:style-name="P29"><text:soft-page-break/><text:span text:style-name="T1">Тестирование на пилотном объекте, сбор метрик и корректировка. (Требуется уточнение.)</text:span><text:bookmark text:name="fnref40_67"/><text:a xlink:type="simple" xlink:href="#fn40" text:style-name="ListLabel_20_613" text:visited-style-name="ListLabel_20_613"><text:span text:style-name="T2">[40]</text:span></text:a></text:p>
        </text:list-item>
      </text:list>
      <text:p text:style-name="P3"><draw:custom-shape text:anchor-type="as-char" draw:z-index="5" draw:name="Прямоугольник 1" draw:style-name="gr5" draw:text-style-name="P4" svg:width="6.6043in" svg:height="0.001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bookmark-start text:name="bm_7_список_вопросов_к_заказчику"/><text:span text:style-name="T3">7. Список вопросов к заказчику</text:span><text:bookmark-end text:name="bm_7_список_вопросов_к_заказчику"/></text:p>
      <text:p text:style-name="P5"><text:bookmark-start text:name="по_разделу_1_2_цели_и_описание_системы"/><text:span text:style-name="T3">По разделу 1–2 (Цели и описание системы)</text:span><text:bookmark-end text:name="по_разделу_1_2_цели_и_описание_системы"/></text:p>
      <text:list text:style-name="WWNum60">
        <text:list-item>
          <text:p text:style-name="P30"><text:span text:style-name="T4">Какие конкретные бизнес‑метрики считать целевыми (конверсия в сделку, CPL, CPA, LTV, скорость реакции и др.) и какими значениями вы будете довольны?</text:span></text:p>
        </text:list-item>
        <text:list-item>
          <text:p text:style-name="P30"><text:span text:style-name="T4">Какой масштаб использовать для пилота: только один коттеджный посёлок или сразу несколько проектов/сайтов застройщика?</text:span></text:p>
        </text:list-item>
      </text:list>
      <text:p text:style-name="P5"><text:bookmark-start text:name="по_разделу_3_функциональные_требования"/><text:span text:style-name="T3">По разделу 3 (Функциональные требования)</text:span><text:bookmark-end text:name="по_разделу_3_функциональные_требования"/></text:p>
      <text:list text:style-name="WWNum61">
        <text:list-item>
          <text:p text:style-name="P31"><text:span text:style-name="T4">Какие именно паттерны поведения на сайте (страницы, клики, события) вы считаете критическими для “горячего” интереса и должны обязательно отслеживаться?</text:span></text:p>
        </text:list-item>
        <text:list-item>
          <text:p text:style-name="P31"><text:span text:style-name="T4">Какие KPI по каналам (Avito, VK, Директ и др.) важно видеть в отчётах нейроаналитика в первую очередь?</text:span></text:p>
        </text:list-item>
        <text:list-item>
          <text:p text:style-name="P31"><text:soft-page-break/><text:span text:style-name="T4">Какие точки касания должны запускать нейропродажника: кнопка “задать вопрос”, достижение определённой цели, превышение порога времени на странице, и т.п.?</text:span></text:p>
        </text:list-item>
        <text:list-item>
          <text:p text:style-name="P31"><text:span text:style-name="T4">До какого конкретного этапа воронки в текущем пилоте нейропродажник должен вести клиента (подтверждение интереса, сбор контактов, бронь, предварительное согласие и т.п.)?</text:span></text:p>
        </text:list-item>
        <text:list-item>
          <text:p text:style-name="P31"><text:span text:style-name="T4">Какие типы прогнозов (если нужны) вы ожидаете от системы: прогноз продаж, прогноз эффективности каналов, вероятность закрытия лида?</text:span></text:p>
        </text:list-item>
      </text:list>
      <text:p text:style-name="P5"><text:bookmark-start text:name="по_разделу_4_нефункциональные_требования"/><text:span text:style-name="T3">По разделу 4 (Нефункциональные требования)</text:span><text:bookmark-end text:name="по_разделу_4_нефункциональные_требования"/></text:p>
      <text:list text:style-name="WWNum62">
        <text:list-item>
          <text:p text:style-name="P32"><text:span text:style-name="T4">Какая максимальная допустимая задержка между “горячим” событием (действие на сайте) и реакцией системы (сообщение/задача) для вас комфортна (в секундах/минутах)?</text:span></text:p>
        </text:list-item>
        <text:list-item>
          <text:p text:style-name="P32"><text:span text:style-name="T4">Какие критерии “человекоподобности” диалога для вас важны (длина сообщений, стиль, допустимый уровень “ошибок”, примеры хороших/плохих диалогов)?</text:span></text:p>
        </text:list-item>
      </text:list>
      <text:p text:style-name="P5"><text:bookmark-start text:name="по_разделу_5_интеграции"/><text:span text:style-name="T3">По разделу 5 (Интеграции)</text:span><text:bookmark-end text:name="по_разделу_5_интеграции"/></text:p>
      <text:list text:style-name="WWNum63">
        <text:list-item>
          <text:p text:style-name="P33"><text:soft-page-break/><text:span text:style-name="T4">В каком формате вы готовы предоставить доступ к Яндекс.Метрике и отчётам (доступ к счётчику, API, файлы CSV/JSON, примеры выгрузок)?</text:span></text:p>
        </text:list-item>
        <text:list-item>
          <text:p text:style-name="P33"><text:span text:style-name="T4">Какие конкретно поля/объекты amoCRM можно использовать и расширять (кастомные поля, теги, задачи), и кто на вашей стороне ответственен за их настройку?</text:span></text:p>
        </text:list-item>
        <text:list-item>
          <text:p text:style-name="P33"><text:span text:style-name="T4">Какой набор каналов коммуникации вы считаете обязательным для пилота (Telegram, Авито‑чат, SMS, звонки), и какой канал должен быть “по умолчанию”?</text:span></text:p>
        </text:list-item>
        <text:list-item>
          <text:p text:style-name="P33"><text:span text:style-name="T4">Насколько глубоко вы планируете использовать IntellectDialog: только телефоны и интеграция с CRM, или также транскрипты звонков для аналитики/обучения?</text:span></text:p>
        </text:list-item>
      </text:list>
      <text:p text:style-name="P5"><text:bookmark-start text:name="по_разделу_6_ограничения_и_допущения"/><text:span text:style-name="T3">По разделу 6 (Ограничения и допущения)</text:span><text:bookmark-end text:name="по_разделу_6_ограничения_и_допущения"/></text:p>
      <text:list text:style-name="WWNum64">
        <text:list-item>
          <text:p text:style-name="P34"><text:span text:style-name="T4">Есть ли у вас внутренние юридические заключения/политики по 152‑ФЗ и трансграничной передаче данных, которыми нужно руководствоваться при проектировании системы?</text:span></text:p>
        </text:list-item>
        <text:list-item>
          <text:p text:style-name="P34"><text:soft-page-break/><text:span text:style-name="T4">Требуется ли вам, чтобы пользователь явно видел, что общается с ботом (и если да, то где: в политике, в интерфейсе, в первом сообщении)?</text:span></text:p>
        </text:list-item>
        <text:list-item>
          <text:p text:style-name="P34"><text:span text:style-name="T4">Какие категории персональных данных (ФИО, телефоны, адреса, аудио, переписка) запрещено передавать в облачные сервисы даже в обезличенном виде?</text:span></text:p>
        </text:list-item>
      </text:list>
      <text:p text:style-name="P5"><text:bookmark-start text:name="по_разделу_7_риски"/><text:span text:style-name="T3">По разделу 7 (Риски)</text:span><text:bookmark-end text:name="по_разделу_7_риски"/></text:p>
      <text:list text:style-name="WWNum65">
        <text:list-item>
          <text:p text:style-name="P35"><text:span text:style-name="T4">Какой уровень зависимости от IntellectDialog для вас приемлем: готовы ли вы рассматривать сценарий, при котором этот сервис недоступен или работает только по части посетителей?</text:span></text:p>
        </text:list-item>
        <text:list-item>
          <text:p text:style-name="P35"><text:span text:style-name="T4">Какие репутационные риски вы считаете наиболее критичными (неудачные диалоги, юридические претензии, утечки данных) и как вы бы хотели их минимизировать (ограничения, предупреждения, ручной контроль)?</text:span></text:p>
        </text:list-item>
      </text:list>
      <text:p text:style-name="P5"><text:bookmark-start text:name="по_разделу_8_план_и_сроки"/><text:span text:style-name="T3">По разделу 8 (План и сроки)</text:span><text:bookmark-end text:name="по_разделу_8_план_и_сроки"/></text:p>
      <text:list text:style-name="WWNum66">
        <text:list-item>
          <text:p text:style-name="P36"><text:soft-page-break/><text:span text:style-name="T4">Есть ли у проекта жёсткие внешние дедлайны (например, связанные с маркетинговой кампанией, отчётностью перед инвесторами или сезоном продаж)?</text:span></text:p>
        </text:list-item>
        <text:list-item>
          <text:p text:style-name="P36"><text:span text:style-name="T4">В какой последовательности вы хотите видеть результаты: сначала отчётность нейроаналитика, потом прототип чат‑бота, или параллельно?</text:span></text:p>
        </text:list-item>
      </text:list>
      <text:p text:style-name="P37"><text:span text:style-name="T4">⁂</text:span></text:p>
      <text:p text:style-name="P17"><text:span text:style-name="T4"><text:s/>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style:line-height-at-least="0.1665in" fo:text-align="start" style:justify-single-word="false" fo:orphans="2" fo:widows="2" style:writing-mode="lr-tb"/>
      <style:text-properties style:font-name="Georgia" fo:font-family="Georgia" style:font-family-generic="roman" style:font-pitch="variable" fo:font-size="10.5pt" style:letter-kerning="false" style:font-size-asian="10.5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0835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Aptos" fo:font-family="Aptos" style:font-family-generic="roman" style:font-pitch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Aptos" fo:font-family="Aptos" style:font-family-generic="roman" style:font-pitch="variabl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Aptos" fo:font-family="Aptos" style:font-family-generic="roman" style:font-pitch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Aptos" fo:font-family="Aptos" style:font-family-generic="roman" style:font-pitch="variable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Aptos" fo:font-family="Aptos" style:font-family-generic="roman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Aptos" fo:font-family="Aptos" style:font-family-generic="roman" style:font-pitch="variable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Aptos" fo:font-family="Aptos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Aptos" fo:font-family="Aptos" style:font-family-generic="roman" style:font-pitch="variable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Aptos" fo:font-family="Aptos" style:font-family-generic="roman" style:font-pitch="variable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Aptos" fo:font-family="Aptos" style:font-family-generic="roman" style:font-pitch="variable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="Aptos" fo:font-family="Aptos" style:font-family-generic="roman" style:font-pitch="variable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Aptos" fo:font-family="Aptos" style:font-family-generic="roman" style:font-pitch="variable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style:font-name="Aptos" fo:font-family="Aptos" style:font-family-generic="roman" style:font-pitch="variable"/>
    </style:style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/>
    </style:style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>
      <style:text-properties style:font-name="Aptos" fo:font-family="Aptos" style:font-family-generic="roman" style:font-pitch="variable"/>
    </style:style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/>
    </style:style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Aptos" fo:font-family="Aptos" style:font-family-generic="roman" style:font-pitch="variable"/>
    </style:style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/>
    </style:style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>
      <style:text-properties style:font-name="Aptos" fo:font-family="Aptos" style:font-family-generic="roman" style:font-pitch="variable"/>
    </style:style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/>
    </style:style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style:font-name="Aptos" fo:font-family="Aptos" style:font-family-generic="roman" style:font-pitch="variable"/>
    </style:style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>
      <style:text-properties style:font-name="Aptos" fo:font-family="Aptos" style:font-family-generic="roman" style:font-pitch="variable"/>
    </style:style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>
      <style:text-properties style:font-name="Aptos" fo:font-family="Aptos" style:font-family-generic="roman" style:font-pitch="variable"/>
    </style:style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text-position="super 58%" style:font-name="inter" fo:font-family="inter" style:font-family-generic="roman" style:font-pitch="variable" style:text-underline-style="solid" style:text-underline-width="auto" style:text-underline-color="font-color" style:font-name-asian="inter1" style:font-family-asian="inter" style:font-family-generic-asian="system" style:font-pitch-asian="variable" style:font-name-complex="inter1" style:font-family-complex="inter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14" style:display-name="ListLabel 614" style:family="text">
      <style:text-properties style:text-position="super 58%" style:font-name="inter" fo:font-family="inter" style:font-family-generic="roman" style:font-pitch="variable" fo:font-size="8.5pt" style:text-underline-style="solid" style:text-underline-width="auto" style:text-underline-color="font-color" style:font-name-asian="inter1" style:font-family-asian="inter" style:font-family-generic-asian="system" style:font-pitch-asian="variable" style:font-size-asian="8.5pt" style:font-name-complex="inter1" style:font-family-complex="inter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1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1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1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1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1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2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2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2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3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</text:list-level-style-number>
      <text:list-level-style-number text:level="3" text:style-name="ListLabel_20_3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3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3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3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4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/>
      </text:list-level-style-bullet>
      <text:list-level-style-number text:level="3" text:style-name="ListLabel_20_4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4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5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5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5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 text:start-value="17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5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6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48in" fo:margin-bottom="0.948in" fo:margin-left="0.948in" fo:margin-right="0.948in" style:writing-mode="lr-tb" style:layout-grid-color="#c0c0c0" style:layout-grid-lines="23124" style:layout-grid-base-height="0.0693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00</meta:initial-creator>
    <meta:editing-cycles>2</meta:editing-cycles>
    <meta:creation-date>2026-01-23T09:12:00</meta:creation-date>
    <dc:date>2026-01-25T18:34:59.013275091</dc:date>
    <meta:editing-duration>PT5M20S</meta:editing-duration>
    <meta:generator>LibreOffice/25.8.4.2$Linux_X86_64 LibreOffice_project/580$Build-2</meta:generator>
    <meta:document-statistic meta:table-count="2" meta:image-count="0" meta:object-count="0" meta:page-count="29" meta:paragraph-count="192" meta:word-count="2450" meta:character-count="19770" meta:non-whitespace-character-count="17562"/>
    <meta:user-defined meta:name="AppVersion">16.0000</meta:user-defined>
    <meta:template xlink:type="simple" xlink:actuate="onRequest" xlink:title="Normal.dotm" xlink:href=""/>
  </office:meta>
</office:document-meta>
</file>