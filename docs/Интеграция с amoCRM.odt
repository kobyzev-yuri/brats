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6in" fo:margin-top="0in" fo:margin-bottom="0in" table:align="center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146in"/>
    </style:style>
    <style:style style:name="Table1.C" style:family="table-column">
      <style:table-column-properties style:column-width="2.1396in"/>
    </style:style>
    <style:style style:name="Table1.D" style:family="table-column">
      <style:table-column-properties style:column-width="1.508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111in" fo:padding-right="0.1111in" fo:padding-top="0.0556in" fo:padding-bottom="0.0556in" fo:border-left="0.25pt solid #000000" fo:border-right="0.1pt solid #000000" fo:border-top="0.1pt solid #000000" fo:border-bottom="0.1pt solid #000000" style:writing-mode="lr-tb"/>
    </style:style>
    <style:style style:name="Table1.B1" style:family="table-cell">
      <style:table-cell-properties fo:padding-left="0.1111in" fo:padding-right="0.1111in" fo:padding-top="0.0556in" fo:padding-bottom="0.0556in" fo:border-left="none" fo:border-right="0.1pt solid #000000" fo:border-top="0.1pt solid #000000" fo:border-bottom="0.1pt solid #000000" style:writing-mode="lr-tb"/>
    </style:style>
    <style:style style:name="Table1.D1" style:family="table-cell">
      <style:table-cell-properties fo:padding-left="0.1111in" fo:padding-right="0.1111in" fo:padding-top="0.0556in" fo:padding-bottom="0.0556in" fo:border-left="none" fo:border-right="0.25pt solid #000000" fo:border-top="0.1pt solid #000000" fo:border-bottom="0.1pt solid #000000" style:writing-mode="lr-tb"/>
    </style:style>
    <style:style style:name="P1" style:family="paragraph" style:parent-style-name="Standard">
      <style:paragraph-properties fo:margin-left="-0.0209in" fo:margin-top="0.2189in" fo:margin-bottom="0.0728in" style:contextual-spacing="false" fo:line-height="150%"/>
    </style:style>
    <style:style style:name="P2" style:family="paragraph" style:parent-style-name="Standard">
      <style:paragraph-properties fo:margin-top="0in" fo:margin-bottom="0.1457in" style:contextual-spacing="false" fo:line-height="150%"/>
    </style:style>
    <style:style style:name="P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Georgia" fo:font-size="10.5pt" fo:language="ru" fo:country="RU" style:letter-kerning="false" style:font-name-asian="Calibri" style:font-size-asian="10.5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left="0.3752in" fo:margin-top="0in" fo:margin-bottom="0.1457in" style:contextual-spacing="false" fo:line-height="150%"/>
    </style:style>
    <style:style style:name="T1" style:family="text">
      <style:text-properties fo:color="#000000" loext:opacity="100%" fo:font-family="inter" style:font-family-generic="roman" style:font-pitch="variable" fo:font-size="12pt" fo:font-weight="bold" style:font-family-asian="inter" style:font-family-generic-asian="system" style:font-pitch-asian="variable" style:font-size-asian="12pt" style:font-weight-asian="bold" style:font-family-complex="inter" style:font-family-generic-complex="system" style:font-pitch-complex="variable"/>
    </style:style>
    <style:style style:name="T2" style:family="text">
      <style:text-properties fo:color="#000000" loext:opacity="100%" fo:font-family="inter" style:font-family-generic="roman" style:font-pitch="variable" style:font-family-asian="inter" style:font-family-generic-asian="system" style:font-pitch-asian="variable" style:font-family-complex="inter" style:font-family-generic-complex="system" style:font-pitch-complex="variable"/>
    </style:style>
    <style:style style:name="T3" style:family="text">
      <style:text-properties fo:language="en" fo:country="US"/>
    </style:style>
    <style:style style:name="T4" style:family="text">
      <style:text-properties fo:color="#000000" loext:opacity="100%" fo:font-family="inter" style:font-family-generic="roman" style:font-pitch="variable" fo:font-size="12pt" fo:language="en" fo:country="US" fo:font-weight="bold" style:font-family-asian="inter" style:font-family-generic-asian="system" style:font-pitch-asian="variable" style:font-size-asian="12pt" style:font-weight-asian="bold" style:font-family-complex="inter" style:font-family-generic-complex="system" style:font-pitch-complex="variable"/>
    </style:style>
    <style:style style:name="T5" style:family="text">
      <style:text-properties fo:color="#000000" loext:opacity="100%" fo:font-family="inter" style:font-family-generic="roman" style:font-pitch="variable" fo:language="en" fo:country="US" style:font-family-asian="inter" style:font-family-generic-asian="system" style:font-pitch-asian="variable" style:font-family-complex="inter" style:font-family-generic-complex="system" style:font-pitch-complex="variable"/>
    </style:style>
    <style:style style:name="T6" style:family="text">
      <style:text-properties fo:color="#000000" loext:opacity="100%" fo:font-family="inter" style:font-family-generic="roman" style:font-pitch="variable" fo:font-size="8.5pt" style:font-family-asian="inter" style:font-family-generic-asian="system" style:font-pitch-asian="variable" style:font-size-asian="8.5pt" style:font-family-complex="inter" style:font-family-generic-complex="system" style:font-pitch-complex="variable"/>
    </style:style>
    <style:style style:name="T7" style:family="text">
      <style:text-properties fo:color="#000000" loext:opacity="100%" fo:font-family="inter" style:font-family-generic="roman" style:font-pitch="variable" fo:font-size="8.5pt" fo:language="en" fo:country="US" style:font-family-asian="inter" style:font-family-generic-asian="system" style:font-pitch-asian="variable" style:font-size-asian="8.5pt" style:font-family-complex="inter" style:font-family-generic-complex="system" style:font-pitch-complex="variable"/>
    </style:style>
    <style:style style:name="T8" style:family="text">
      <style:text-properties fo:color="#000000" loext:opacity="100%" fo:font-family="'IBM Plex Mono'" style:font-family-generic="roman" style:font-pitch="variable" fo:font-size="9pt" fo:language="en" fo:country="US" fo:background-color="#f8f8fa" loext:char-shading-value="0" style:font-family-asian="'IBM Plex Mono'" style:font-family-generic-asian="system" style:font-pitch-asian="variable" style:font-size-asian="9pt" style:font-family-complex="'IBM Plex Mono'" style:font-family-generic-complex="system" style:font-pitch-complex="variable"/>
    </style:style>
    <style:style style:name="T9" style:family="text">
      <style:text-properties fo:color="#000000" loext:opacity="100%" fo:font-family="'IBM Plex Mono'" style:font-family-generic="roman" style:font-pitch="variable" fo:font-size="9pt" fo:background-color="#f8f8fa" loext:char-shading-value="0" style:font-family-asian="'IBM Plex Mono'" style:font-family-generic-asian="system" style:font-pitch-asian="variable" style:font-size-asian="9pt" style:font-family-complex="'IBM Plex Mono'" style:font-family-generic-complex="system" style:font-pitch-complex="variable"/>
    </style:style>
    <style:style style:name="T10" style:family="text">
      <style:text-properties fo:color="#000000" loext:opacity="100%" fo:font-family="inter" style:font-family-generic="roman" style:font-pitch="variable" fo:font-size="9pt" style:font-family-asian="inter" style:font-family-generic-asian="system" style:font-pitch-asian="variable" style:font-size-asian="9pt" style:font-family-complex="inter" style:font-family-generic-complex="system" style:font-pitch-complex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чтение_данных_онлайн_4_1"/><text:span text:style-name="T1">Чтение данных онлайн (4.1)</text:span><text:bookmark-end text:name="чтение_данных_онлайн_4_1"/></text:p>
      <text:p text:style-name="P2"><text:span text:style-name="T2">Через Leads API (GET /api/v4/leads) читаеть ID сделки (лида), status_id (стадия/этап), pipeline_id (воронка), source_id (источник с with=source).<text:line-break/>"Найден ли клиент" проверять по _embedded.contacts (with=contacts) — если массив не пустой и есть is_main=true, клиент привязан.<text:line-break/>Фильтры по query или filter позволяют искать дублей по имени/телефону/почте, аналогия как grep по базе.</text:span></text:p>
      <text:p text:style-name="P1" loext:marker-style-name="T3"><text:bookmark-start text:name="запись_данных_4_2"/><text:span text:style-name="T1">Запись</text:span><text:span text:style-name="T4"> </text:span><text:span text:style-name="T1">данных</text:span><text:span text:style-name="T4"> (4.2)</text:span><text:bookmark-end text:name="запись_данных_4_2"/></text:p>
      <text:p text:style-name="P2"><text:span text:style-name="T2">Факт</text:span><text:span text:style-name="T5"> </text:span><text:span text:style-name="T2">диалога</text:span><text:span text:style-name="T5"> — POST /api/v4/leads/{id}/notes </text:span><text:span text:style-name="T2">с</text:span><text:span text:style-name="T5"> note_type="call_in"/"call_out" </text:span><text:span text:style-name="T2">или</text:span><text:span text:style-name="T5"> "common", params </text:span><text:span text:style-name="T2">с</text:span><text:span text:style-name="T5"> uniq, duration, phone (</text:span><text:span text:style-name="T2">пример</text:span><text:span text:style-name="T5"> </text:span><text:span text:style-name="T2">в</text:span><text:span text:style-name="T5"> notes API).</text:span><text:bookmark text:name="fnref1"/><text:span text:style-name="T5"> <text:line-break/></text:span><text:span text:style-name="T2">Квалификация</text:span><text:span text:style-name="T5"> </text:span><text:span text:style-name="T2">и</text:span><text:span text:style-name="T5"> handoff — custom_fields_values (</text:span><text:span text:style-name="T2">доп</text:span><text:span text:style-name="T5">. </text:span><text:span text:style-name="T2">поля</text:span><text:span text:style-name="T5"> </text:span><text:span text:style-name="T2">лида</text:span><text:span text:style-name="T5">) </text:span><text:span text:style-name="T2">при</text:span><text:span text:style-name="T5"> POST/PATCH /api/v4/leads, </text:span><text:span text:style-name="T2">или</text:span><text:span text:style-name="T5"> </text:span><text:span text:style-name="T2">теги</text:span><text:span text:style-name="T5"> tags_to_add; handoff </text:span><text:span text:style-name="T2">как</text:span><text:span text:style-name="T5"> </text:span><text:span text:style-name="T2">смена</text:span><text:span text:style-name="T5"> responsible_user_id.</text:span><text:bookmark text:name="fnref1_1"/><text:span text:style-name="T5"> <text:line-break/></text:span><text:span text:style-name="T2">Пишется пакетно до 250, но с контролем дублей в /leads/complex.</text:span></text:p>
      <text:p text:style-name="P1"><text:bookmark-start text:name="ограничения_4_3"/><text:span text:style-name="T1">Ограничения (4.3)</text:span><text:bookmark-end text:name="ограничения_4_3"/></text:p>
      <text:p text:style-name="P2"><text:span text:style-name="T2">Нельзя менять: поля created_by/updated_by (только чтение), closed_at без loss_reason_id при отказе; лимит 250 на запрос, 7 req/s на интеграцию.</text:span><text:bookmark text:name="fnref2"/><text:span text:style-name="T2"> <text:line-break/>Запрещено: массовый спам запросами (429/403 блок), редакт удаленных (is_deleted=true), без прав (403); после конца подписки — только чтение 30 дней.</text:span><text:bookmark text:name="fnref2_1"/><text:span text:style-name="T2"> <text:line-break/>Коряво: без with не видно source_id или contacts; для виджетов — запреты на смену status_id через JS, но API позволяет если права есть.</text:span><text:bookmark text:name="fnref3"/><text:span text:style-name="T2"> <text:line-break/></text:span></text:p>
      <text:p text:style-name="P1"><text:bookmark-start text:name="данные_с_которыми_работает_интегр_5f784a"/><text:span text:style-name="T1">Данные, с которыми работает интеграция amoCRM</text:span><text:bookmark-end text:name="данные_с_которыми_работает_интегр_5f784a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6">Блок</text:span></text:p>
          </table:table-cell>
          <table:table-cell table:style-name="Table1.B1" office:value-type="string">
            <text:p text:style-name="P3"><text:span text:style-name="T6">Что делаем</text:span></text:p>
          </table:table-cell>
          <table:table-cell table:style-name="Table1.B1" office:value-type="string">
            <text:p text:style-name="P3"><text:span text:style-name="T6">Конкретные поля/сущности</text:span></text:p>
          </table:table-cell>
          <table:table-cell table:style-name="Table1.D1" office:value-type="string">
            <text:p text:style-name="P3"><text:span text:style-name="T6">Комментарии / доп. моменты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6">Чтение: наличие клиента</text:span></text:p>
          </table:table-cell>
          <table:table-cell table:style-name="Table1.B1" office:value-type="string">
            <text:p text:style-name="P3"><text:span text:style-name="T6">Читаем</text:span></text:p>
          </table:table-cell>
          <table:table-cell table:style-name="Table1.B1" office:value-type="string">
            <text:p text:style-name="P3" loext:marker-style-name="T3"><text:span text:style-name="T6">Лиды</text:span><text:span text:style-name="T7">: </text:span><text:span text:style-name="Verbatim_20_Char"><text:span text:style-name="T8">/api/v4/leads</text:span></text:span><text:span text:style-name="T7"> </text:span><text:span text:style-name="T6">с</text:span><text:span text:style-name="T7"> </text:span><text:span text:style-name="Verbatim_20_Char"><text:span text:style-name="T8">with=contacts</text:span></text:span><text:span text:style-name="T7">; </text:span><text:span text:style-name="T6">поле</text:span><text:span text:style-name="T7"> </text:span><text:span text:style-name="Verbatim_20_Char"><text:span text:style-name="T8">_embedded.contacts</text:span></text:span><text:span text:style-name="T7">.</text:span><text:span text:style-name="T3"> </text:span></text:p>
          </table:table-cell>
          <table:table-cell table:style-name="Table1.D1" office:value-type="string">
            <text:p text:style-name="P3"><text:span text:style-name="T6">Клиент считается «найден», если к лиду привязан хотя бы один контакт (можно ориентироваться на </text:span><text:span text:style-name="Verbatim_20_Char"><text:span text:style-name="T9">is_main=true</text:span></text:span><text:span text:style-name="T6">)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Чтение: стадия лида</text:span></text:p>
          </table:table-cell>
          <table:table-cell table:style-name="Table1.B1" office:value-type="string">
            <text:p text:style-name="P3"><text:span text:style-name="T6">Читаем</text:span></text:p>
          </table:table-cell>
          <table:table-cell table:style-name="Table1.B1" office:value-type="string">
            <text:p text:style-name="P3" loext:marker-style-name="T3"><text:span text:style-name="Verbatim_20_Char"><text:span text:style-name="T8">status_id</text:span></text:span><text:span text:style-name="T7">, </text:span><text:span text:style-name="Verbatim_20_Char"><text:span text:style-name="T8">pipeline_id</text:span></text:span><text:span text:style-name="T7"> </text:span><text:span text:style-name="T6">лида</text:span><text:span text:style-name="T7"> + </text:span><text:span text:style-name="T6">справочник</text:span><text:span text:style-name="T7"> </text:span><text:span text:style-name="T6">стадий</text:span><text:span text:style-name="T7"> </text:span><text:span text:style-name="Verbatim_20_Char"><text:span text:style-name="T8">/api/v4/leads/pipelines</text:span></text:span><text:span text:style-name="T7">.</text:span><text:span text:style-name="T3"> </text:span></text:p>
          </table:table-cell>
          <table:table-cell table:style-name="Table1.D1" office:value-type="string">
            <text:p text:style-name="P3"><text:span text:style-name="T6">По ID стадии и воронки восстанавливаем бизнес-смысл (этап воронки, название)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Чтение: источник лида</text:span></text:p>
          </table:table-cell>
          <table:table-cell table:style-name="Table1.B1" office:value-type="string">
            <text:p text:style-name="P3"><text:span text:style-name="T6">Читаем</text:span></text:p>
          </table:table-cell>
          <table:table-cell table:style-name="Table1.B1" office:value-type="string">
            <text:p text:style-name="P3"><text:span text:style-name="T6">Поле источника (source / source_id), иногда как доп. поле или системный источник, плюс </text:span><text:span text:style-name="Verbatim_20_Char"><text:span text:style-name="T9">utm_*</text:span></text:span><text:span text:style-name="T6"> и другие маркеры в custom_fields_values.</text:span> </text:p>
          </table:table-cell>
          <table:table-cell table:style-name="Table1.D1" office:value-type="string">
            <text:p text:style-name="P3"><text:span text:style-name="T6">Источник может храниться как стандартный источник, так и как набор UTM/маркетинговых полей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Чтение: данные клиента</text:span></text:p>
          </table:table-cell>
          <table:table-cell table:style-name="Table1.B1" office:value-type="string">
            <text:p text:style-name="P3"><text:span text:style-name="T6">Читаем</text:span></text:p>
          </table:table-cell>
          <table:table-cell table:style-name="Table1.B1" office:value-type="string">
            <text:p text:style-name="P3"><text:span text:style-name="T6">Контакты: ФИО, телефоны, email, кастомные поля, теги; компании, связанные сущности.</text:span> </text:p>
          </table:table-cell>
          <table:table-cell table:style-name="Table1.D1" office:value-type="string">
            <text:p text:style-name="P3"><text:span text:style-name="T6">Для квалификации и маршрутизации обычно читаем контакты + компанию + заметки и события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Чтение: история взаимодействий</text:span></text:p>
          </table:table-cell>
          <table:table-cell table:style-name="Table1.B1" office:value-type="string">
            <text:p text:style-name="P3"><text:span text:style-name="T6">Читаем</text:span></text:p>
          </table:table-cell>
          <table:table-cell table:style-name="Table1.B1" office:value-type="string">
            <text:p text:style-name="P3"><text:span text:style-name="T6">Примечания и события: </text:span><text:span text:style-name="Verbatim_20_Char"><text:span text:style-name="T9">/api/v4/leads/{id}/notes</text:span></text:span><text:span text:style-name="T6">, </text:span><text:span text:style-name="Verbatim_20_Char"><text:span text:style-name="T9">/api/v4/events</text:span></text:span><text:span text:style-name="T6">.</text:span> </text:p>
          </table:table-cell>
          <table:table-cell table:style-name="Table1.D1" office:value-type="string">
            <text:p text:style-name="P3"><text:span text:style-name="T6">Можно подтягивать старые звонки, сообщения, системные события (смена стадии, ответственный и т.п.)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6">Запись: факт диалога</text:span></text:p>
          </table:table-cell>
          <table:table-cell table:style-name="Table1.B1" office:value-type="string">
            <text:p text:style-name="P3"><text:span text:style-name="T6">Пишем</text:span></text:p>
          </table:table-cell>
          <table:table-cell table:style-name="Table1.B1" office:value-type="string">
            <text:p text:style-name="P3" loext:marker-style-name="T3"><text:span text:style-name="T6">Примечания</text:span><text:span text:style-name="T7">/</text:span><text:span text:style-name="T6">записки</text:span><text:span text:style-name="T7"> </text:span><text:span text:style-name="T6">к</text:span><text:span text:style-name="T7"> </text:span><text:span text:style-name="T6">лиду</text:span><text:span text:style-name="T7">: POST </text:span><text:span text:style-name="Verbatim_20_Char"><text:span text:style-name="T8">/api/v4/leads/{id}/notes</text:span></text:span><text:span text:style-name="T7"> </text:span><text:span text:style-name="T6">с</text:span><text:span text:style-name="T7"> </text:span><text:span text:style-name="T6">типами</text:span><text:span text:style-name="T7"> </text:span><text:span text:style-name="Verbatim_20_Char"><text:span text:style-name="T8">common</text:span></text:span><text:span text:style-name="T7">, </text:span><text:span text:style-name="Verbatim_20_Char"><text:span text:style-name="T8">call_in</text:span></text:span><text:span text:style-name="T7">, </text:span><text:span text:style-name="Verbatim_20_Char"><text:span text:style-name="T8">call_out</text:span></text:span><text:span text:style-name="T7">, </text:span><text:span text:style-name="Verbatim_20_Char"><text:span text:style-name="T8">service</text:span></text:span><text:span text:style-name="T7"> </text:span><text:span text:style-name="T6">и</text:span><text:span text:style-name="T7"> </text:span><text:span text:style-name="T6">т</text:span><text:span text:style-name="T7">.</text:span><text:span text:style-name="T6">п</text:span><text:span text:style-name="T7">.</text:span><text:span text:style-name="T3"> </text:span></text:p>
          </table:table-cell>
          <table:table-cell table:style-name="Table1.D1" office:value-type="string">
            <text:p text:style-name="P3"><text:span text:style-name="T6">Вносим текст диалога, метаданные (телефон, длительность, канал, идентификатор сессии/чата). Важно логировать uniq/id внешнего события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Запись: квалификация</text:span></text:p>
          </table:table-cell>
          <table:table-cell table:style-name="Table1.B1" office:value-type="string">
            <text:p text:style-name="P3"><text:span text:style-name="T6">Пишем</text:span></text:p>
          </table:table-cell>
          <table:table-cell table:style-name="Table1.B1" office:value-type="string">
            <text:p text:style-name="P3"><text:span text:style-name="Verbatim_20_Char"><text:span text:style-name="T9">custom_fields_values</text:span></text:span><text:span text:style-name="T6"> лида (например, «Статус квалификации», «Интересующий продукт», «Сегмент»), теги (</text:span><text:span text:style-name="Verbatim_20_Char"><text:span text:style-name="T9">tags</text:span></text:span><text:span text:style-name="T6">).</text:span> </text:p>
          </table:table-cell>
          <table:table-cell table:style-name="Table1.D1" office:value-type="string">
            <text:p text:style-name="P3"><text:span text:style-name="T6">Логика: одно/несколько полей под квалификацию; обновление PATCH /leads пакетами (до 250 штук)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Запись: handoff (передача)</text:span></text:p>
          </table:table-cell>
          <table:table-cell table:style-name="Table1.B1" office:value-type="string">
            <text:p text:style-name="P3"><text:span text:style-name="T6">Пишем</text:span></text:p>
          </table:table-cell>
          <table:table-cell table:style-name="Table1.B1" office:value-type="string">
            <text:p text:style-name="P3"><text:span text:style-name="Verbatim_20_Char"><text:span text:style-name="T9">responsible_user_id</text:span></text:span><text:span text:style-name="T6">, при необходимости </text:span><text:span text:style-name="Verbatim_20_Char"><text:span text:style-name="T9">status_id</text:span></text:span><text:span text:style-name="T6"> (перевод на спец. этап «Передача»), комментарий-заметка.</text:span> </text:p>
          </table:table-cell>
          <table:table-cell table:style-name="Table1.D1" office:value-type="string">
            <text:p text:style-name="P3"><text:span text:style-name="T6">Handoff оформляется как смена ответственного + опционально смена стадии и сервисная note с деталями передачи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Запись: служебные техполя</text:span></text:p>
          </table:table-cell>
          <table:table-cell table:style-name="Table1.B1" office:value-type="string">
            <text:p text:style-name="P3"><text:span text:style-name="T6">Пишем</text:span></text:p>
          </table:table-cell>
          <table:table-cell table:style-name="Table1.B1" office:value-type="string">
            <text:p text:style-name="P3"><text:span text:style-name="T6">Доп. поля под внешний ID, канал, ID сессии, флаги (например, «обработан ботом», «нужен перезвон»).</text:span></text:p>
          </table:table-cell>
          <table:table-cell table:style-name="Table1.D1" office:value-type="string">
            <text:p text:style-name="P3"><text:span text:style-name="T6">Эти поля помогают не городить логику на стороне CRM, а держать связь с внешней системой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Ограничения: что не трогаем</text:span></text:p>
          </table:table-cell>
          <table:table-cell table:style-name="Table1.B1" office:value-type="string">
            <text:p text:style-name="P3"><text:span text:style-name="T6">Не меняем</text:span></text:p>
          </table:table-cell>
          <table:table-cell table:style-name="Table1.B1" office:value-type="string">
            <text:p text:style-name="P3" loext:marker-style-name="T3"><text:span text:style-name="T6">Системные</text:span><text:span text:style-name="T7"> </text:span><text:span text:style-name="T6">поля</text:span><text:span text:style-name="T7">: </text:span><text:span text:style-name="Verbatim_20_Char"><text:span text:style-name="T8">created_at</text:span></text:span><text:span text:style-name="T7">, </text:span><text:span text:style-name="Verbatim_20_Char"><text:span text:style-name="T8">created_by</text:span></text:span><text:span text:style-name="T7">, </text:span><text:span text:style-name="Verbatim_20_Char"><text:span text:style-name="T8">updated_at</text:span></text:span><text:span text:style-name="T7">, </text:span><text:span text:style-name="Verbatim_20_Char"><text:span text:style-name="T8">account_id</text:span></text:span><text:span text:style-name="T7">, </text:span><text:span text:style-name="T6">внутренние</text:span><text:span text:style-name="T7"> ID.</text:span><text:span text:style-name="T3"> </text:span></text:p>
          </table:table-cell>
          <table:table-cell table:style-name="Table1.D1" office:value-type="string">
            <text:p text:style-name="P3"><text:span text:style-name="T6">Их можно читать, но не стоит пытаться править — API либо игнорирует, либо вернет ошибку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6">Ограничения: права доступа</text:span></text:p>
          </table:table-cell>
          <table:table-cell table:style-name="Table1.B1" office:value-type="string">
            <text:p text:style-name="P3"><text:span text:style-name="T6">Зависит от роли</text:span></text:p>
          </table:table-cell>
          <table:table-cell table:style-name="Table1.B1" office:value-type="string">
            <text:p text:style-name="P3"><text:span text:style-name="T6">Изменение стадий, ответственных, удаление сущностей — только при наличии прав пользователя/интеграции.</text:span> </text:p>
          </table:table-cell>
          <table:table-cell table:style-name="Table1.D1" office:value-type="string">
            <text:p text:style-name="P3"><text:span text:style-name="T6">Если у пользователя в CRM нет права менять этап/ответственного, интеграция от его имени тоже не сможет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Ограничения: запрет действий бизнес-логикой</text:span></text:p>
          </table:table-cell>
          <table:table-cell table:style-name="Table1.B1" office:value-type="string">
            <text:p text:style-name="P3"><text:span text:style-name="T6">Запрещено/ограничено</text:span></text:p>
          </table:table-cell>
          <table:table-cell table:style-name="Table1.B1" office:value-type="string">
            <text:p text:style-name="P3"><text:span text:style-name="T6">Воронки могут быть защищены виджетами/скриптами от смены статуса (запрет смены этапа, ограничение на откат и т.п.).</text:span> </text:p>
          </table:table-cell>
          <table:table-cell table:style-name="Table1.D1" office:value-type="string">
            <text:p text:style-name="P3"><text:span text:style-name="T6">Даже если API позволяет сменить </text:span><text:span text:style-name="Verbatim_20_Char"><text:span text:style-name="T9">status_id</text:span></text:span><text:span text:style-name="T6">, внутренняя логика/виджет может блокировать переход (или потом откатить)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Ограничения: rate limits</text:span></text:p>
          </table:table-cell>
          <table:table-cell table:style-name="Table1.B1" office:value-type="string">
            <text:p text:style-name="P3"><text:span text:style-name="T6">Ограничено</text:span></text:p>
          </table:table-cell>
          <table:table-cell table:style-name="Table1.B1" office:value-type="string">
            <text:p text:style-name="P3"><text:span text:style-name="T6">До 7 запросов в секунду на одну интеграцию, до 50 запросов в секунду на аккаунт.</text:span> </text:p>
          </table:table-cell>
          <table:table-cell table:style-name="Table1.D1" office:value-type="string">
            <text:p text:style-name="P3"><text:span text:style-name="T6">При превышении — 429/403, возможна временная блокировка. Нужен throttling, backoff, батчевые запросы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Ограничения: объем данных за запрос</text:span></text:p>
          </table:table-cell>
          <table:table-cell table:style-name="Table1.B1" office:value-type="string">
            <text:p text:style-name="P3"><text:span text:style-name="T6">Ограничено</text:span></text:p>
          </table:table-cell>
          <table:table-cell table:style-name="Table1.B1" office:value-type="string">
            <text:p text:style-name="P3"><text:span text:style-name="T6">Типичные лимиты: до 250 сущностей в одном батче при работе с лидами и связанными объектами.</text:span> </text:p>
          </table:table-cell>
          <table:table-cell table:style-name="Table1.D1" office:value-type="string">
            <text:p text:style-name="P3"><text:span text:style-name="T6">При массовых обновлениях обязателен батчинг и очереди, иначе упрёшься в лимиты и таймауты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Ограничения: удаленные/архивные</text:span></text:p>
          </table:table-cell>
          <table:table-cell table:style-name="Table1.B1" office:value-type="string">
            <text:p text:style-name="P3"><text:span text:style-name="T6">Не трогаем</text:span></text:p>
          </table:table-cell>
          <table:table-cell table:style-name="Table1.B1" office:value-type="string">
            <text:p text:style-name="P3"><text:span text:style-name="T6">Сущности с флагами удаления/закрытия (is_deleted, потерянные сделки) — изменение частично или полностью запрещено.</text:span> </text:p>
          </table:table-cell>
          <table:table-cell table:style-name="Table1.D1" office:value-type="string">
            <text:p text:style-name="P3"><text:span text:style-name="T6">Для «мертвых» лидов обычно либо только чтение, либо ограниченные действия, зависящие от настроек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6">Ограничения: после окончания подписки</text:span></text:p>
          </table:table-cell>
          <table:table-cell table:style-name="Table1.B1" office:value-type="string">
            <text:p text:style-name="P3"><text:span text:style-name="T6">Только чтение/ограничено</text:span></text:p>
          </table:table-cell>
          <table:table-cell table:style-name="Table1.B1" office:value-type="string">
            <text:p text:style-name="P3"><text:span text:style-name="T6">Доступ к API и интерфейсу может быть урезан, чаще всего остаётся только просмотр данных в течение ограниченного времени.</text:span> </text:p>
          </table:table-cell>
          <table:table-cell table:style-name="Table1.D1" office:value-type="string">
            <text:p text:style-name="P3"><text:span text:style-name="T6">Интеграция должна корректно переживать 401/403 и падение прав до read-only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Запрещенные сценарии интеграции (по сути антипаттерны)</text:span></text:p>
          </table:table-cell>
          <table:table-cell table:style-name="Table1.B1" office:value-type="string">
            <text:p text:style-name="P3"><text:span text:style-name="T6">Запрещено/не рекомендуется</text:span></text:p>
          </table:table-cell>
          <table:table-cell table:style-name="Table1.B1" office:value-type="string">
            <text:p text:style-name="P3"><text:span text:style-name="T6">Массовая перезапись стадий/ответственных без бизнес-правил, создание дублей лидов/контактов, циклические обновления.</text:span> </text:p>
          </table:table-cell>
          <table:table-cell table:style-name="Table1.D1" office:value-type="string">
            <text:p text:style-name="P3"><text:span text:style-name="T6">Типичные грабли: гоняешь один и тот же лид туда-сюда, ломаешь отчёты и автоматизации, упираешься в лимиты, получаешь блок API.</text:span></text:p>
          </table:table-cell>
        </table:table-row>
      </table:table>
      <text:p text:style-name="Standard"/>
      <text:p text:style-name="P4"><text:span text:style-name="T10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Georgia" fo:font-size="10.5pt" fo:language="ru" fo:country="RU" style:letter-kerning="false" style:font-name-asian="Calibri" style:font-size-asian="10.5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Georgia" fo:font-size="10.5pt" fo:language="ru" fo:country="RU" style:letter-kerning="false" style:font-name-asian="Calibri" style:font-size-asian="10.5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style:line-height-at-least="0.1665in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48in" fo:margin-bottom="0.948in" fo:margin-left="0.948in" fo:margin-right="0.948in" style:writing-mode="lr-tb" style:layout-grid-color="#c0c0c0" style:layout-grid-lines="23124" style:layout-grid-base-height="0.0693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tml-to-docx</meta:initial-creator>
    <meta:keyword>html-to-docx</meta:keyword>
    <dc:creator>adm00</dc:creator>
    <meta:editing-cycles>2</meta:editing-cycles>
    <meta:creation-date>2026-01-29T08:14:00</meta:creation-date>
    <dc:date>2026-01-29T08:19:00</dc:date>
    <meta:editing-duration>PT5M</meta:editing-duration>
    <meta:generator>LibreOffice/25.8.4.2$Linux_X86_64 LibreOffice_project/580$Build-2</meta:generator>
    <meta:document-statistic meta:table-count="1" meta:image-count="0" meta:object-count="0" meta:page-count="5" meta:paragraph-count="80" meta:word-count="682" meta:character-count="5348" meta:non-whitespace-character-count="4713"/>
    <meta:user-defined meta:name="AppVersion">16.0000</meta:user-defined>
    <meta:template xlink:type="simple" xlink:actuate="onRequest" xlink:title="Normal" xlink:href=""/>
  </office:meta>
</office:document-meta>
</file>